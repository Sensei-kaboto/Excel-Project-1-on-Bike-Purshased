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42"/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="thin solid #999999"/>
    </style:style>
    <style:style style:name="ce9" style:family="table-cell" style:parent-style-name="Default" style:data-style-name="N42">
      <style:table-cell-properties fo:border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42">
      <style:table-cell-properties fo:border-top="thin solid #999999" fo:border-bottom="none" fo:border-left="thin solid #999999" fo:border-right="thin solid #999999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42">
      <style:table-cell-properties fo:border-top="thin solid #FFFFFF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7" style:family="table-cell" style:parent-style-name="Default" style:data-style-name="N42">
      <style:table-cell-properties fo:border-top="thin solid #999999" fo:border-bottom="none" fo:border-left="thin solid #999999" fo:border-right="none"/>
    </style:style>
    <style:style style:name="ce18" style:family="table-cell" style:parent-style-name="Default" style:data-style-name="N42">
      <style:table-cell-properties fo:border-top="thin solid #999999" fo:border-bottom="none" fo:border-left="none" fo:border-right="none"/>
    </style:style>
    <style:style style:name="ce19" style:family="table-cell" style:parent-style-name="Default" style:data-style-name="N42">
      <style:table-cell-properties fo:border-top="thin solid #FFFFFF" fo:border-bottom="none" fo:border-left="thin solid #999999" fo:border-right="none"/>
    </style:style>
    <style:style style:name="ce20" style:family="table-cell" style:parent-style-name="Default" style:data-style-name="N42">
      <style:table-cell-properties fo:border-top="thin solid #FFFFFF" fo:border-bottom="none" fo:border-left="none" fo:border-right="none"/>
    </style:style>
    <style:style style:name="ce21" style:family="table-cell" style:parent-style-name="Default" style:data-style-name="N42">
      <style:table-cell-properties fo:border-top="thin solid #999999" fo:border-bottom="thin solid #999999" fo:border-left="thin solid #999999" fo:border-right="none"/>
    </style:style>
    <style:style style:name="ce22" style:family="table-cell" style:parent-style-name="Default" style:data-style-name="N42">
      <style:table-cell-properties fo:border-top="thin solid #999999" fo:border-bottom="thin solid #999999" fo:border-left="none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4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7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1" style:family="table-cell" style:parent-style-name="Default" style:data-style-name="N0">
      <style:table-cell-properties style:vertical-align="middle" fo:background-color="#215C98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2.62466666666667cm" style:use-optimal-column-width="true"/>
    </style:style>
    <style:style style:name="co4" style:family="table-column">
      <style:table-column-properties fo:break-before="auto" style:column-width="3.64066666666667cm" style:use-optimal-column-width="true"/>
    </style:style>
    <style:style style:name="co5" style:family="table-column">
      <style:table-column-properties fo:break-before="auto" style:column-width="3.026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937cm" style:use-optimal-column-width="true"/>
    </style:style>
    <style:style style:name="co8" style:family="table-column">
      <style:table-column-properties fo:break-before="auto" style:column-width="2.8575cm" style:use-optimal-column-width="true"/>
    </style:style>
    <style:style style:name="co9" style:family="table-column">
      <style:table-column-properties fo:break-before="auto" style:column-width="0.740833333333333cm" style:use-optimal-column-width="true"/>
    </style:style>
    <style:style style:name="co10" style:family="table-column">
      <style:table-column-properties fo:break-before="auto" style:column-width="1.94733333333333cm" style:use-optimal-column-width="true"/>
    </style:style>
    <style:style style:name="co11" style:family="table-column">
      <style:table-column-properties fo:break-before="auto" style:column-width="4.7625cm" style:use-optimal-column-width="true"/>
    </style:style>
    <style:style style:name="co12" style:family="table-column">
      <style:table-column-properties fo:break-before="auto" style:column-width="2.688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ing_sheet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arital Status</text:p>
          </table:table-cell>
          <table:table-cell office:value-type="string" table:style-name="ce1">
            <text:p>Gender</text:p>
          </table:table-cell>
          <table:table-cell office:value-type="string" table:style-name="ce3">
            <text:p>Income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Occupation</text:p>
          </table:table-cell>
          <table:table-cell office:value-type="string" table:style-name="ce1">
            <text:p>Home Owner</text:p>
          </table:table-cell>
          <table:table-cell office:value-type="string" table:style-name="ce1">
            <text:p>Cars</text:p>
          </table:table-cell>
          <table:table-cell office:value-type="string" table:style-name="ce1">
            <text:p>Commute Distanc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Age brackets</text:p>
          </table:table-cell>
          <table:table-cell office:value-type="string" table:style-name="ce1">
            <text:p>Purchased Bike</text:p>
          </table:table-cell>
          <table:table-cell table:number-columns-repeated="16370"/>
        </table:table-row>
        <table:table-row table:style-name="ro1">
          <table:table-cell office:value-type="float" office:value="12496" table:style-name="ce1">
            <text:p>124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2]&gt;54;&quot;OLD&quot;;IF([.$L2]&gt;=31;&quot;Middle Age&quot;;IF([.$L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07" table:style-name="ce1">
            <text:p>241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3]&gt;54;&quot;OLD&quot;;IF([.$L3]&gt;=31;&quot;Middle Age&quot;;IF([.$L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77" table:style-name="ce1">
            <text:p>141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4]&gt;54;&quot;OLD&quot;;IF([.$L4]&gt;=31;&quot;Middle Age&quot;;IF([.$L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81" table:style-name="ce1">
            <text:p>243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5]&gt;54;&quot;OLD&quot;;IF([.$L5]&gt;=31;&quot;Middle Age&quot;;IF([.$L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97" table:style-name="ce1">
            <text:p>255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6]&gt;54;&quot;OLD&quot;;IF([.$L6]&gt;=31;&quot;Middle Age&quot;;IF([.$L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507" table:style-name="ce1">
            <text:p>135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7]&gt;54;&quot;OLD&quot;;IF([.$L7]&gt;=31;&quot;Middle Age&quot;;IF([.$L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974" table:style-name="ce1">
            <text:p>279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60000" table:style-name="ce3">
            <text:p><text:s/>$1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8]&gt;54;&quot;OLD&quot;;IF([.$L8]&gt;=31;&quot;Middle Age&quot;;IF([.$L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64" table:style-name="ce1">
            <text:p>193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9]&gt;54;&quot;OLD&quot;;IF([.$L9]&gt;=31;&quot;Middle Age&quot;;IF([.$L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155" table:style-name="ce1">
            <text:p>221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10]&gt;54;&quot;OLD&quot;;IF([.$L10]&gt;=31;&quot;Middle Age&quot;;IF([.$L1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80" table:style-name="ce1">
            <text:p>192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1]&gt;54;&quot;OLD&quot;;IF([.$L11]&gt;=31;&quot;Middle Age&quot;;IF([.$L1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173" table:style-name="ce1">
            <text:p>221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12]&gt;54;&quot;OLD&quot;;IF([.$L12]&gt;=31;&quot;Middle Age&quot;;IF([.$L1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697" table:style-name="ce1">
            <text:p>126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13]&gt;54;&quot;OLD&quot;;IF([.$L13]&gt;=31;&quot;Middle Age&quot;;IF([.$L1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434" table:style-name="ce1">
            <text:p>114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70000" table:style-name="ce3">
            <text:p><text:s/>$1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14]&gt;54;&quot;OLD&quot;;IF([.$L14]&gt;=31;&quot;Middle Age&quot;;IF([.$L1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23" table:style-name="ce1">
            <text:p>253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15]&gt;54;&quot;OLD&quot;;IF([.$L15]&gt;=31;&quot;Middle Age&quot;;IF([.$L1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42" table:style-name="ce1">
            <text:p>235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16]&gt;54;&quot;OLD&quot;;IF([.$L16]&gt;=31;&quot;Middle Age&quot;;IF([.$L1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70" table:style-name="ce1">
            <text:p>208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17]&gt;54;&quot;OLD&quot;;IF([.$L17]&gt;=31;&quot;Middle Age&quot;;IF([.$L1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16" table:style-name="ce1">
            <text:p>2331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18]&gt;54;&quot;OLD&quot;;IF([.$L18]&gt;=31;&quot;Middle Age&quot;;IF([.$L1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610" table:style-name="ce1">
            <text:p>126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19]&gt;54;&quot;OLD&quot;;IF([.$L19]&gt;=31;&quot;Middle Age&quot;;IF([.$L1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83" table:style-name="ce1">
            <text:p>271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20]&gt;54;&quot;OLD&quot;;IF([.$L20]&gt;=31;&quot;Middle Age&quot;;IF([.$L2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40" table:style-name="ce1">
            <text:p>259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21]&gt;54;&quot;OLD&quot;;IF([.$L21]&gt;=31;&quot;Middle Age&quot;;IF([.$L21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98" table:style-name="ce1">
            <text:p>255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22]&gt;54;&quot;OLD&quot;;IF([.$L22]&gt;=31;&quot;Middle Age&quot;;IF([.$L2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64" table:style-name="ce1">
            <text:p>215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23]&gt;54;&quot;OLD&quot;;IF([.$L23]&gt;=31;&quot;Middle Age&quot;;IF([.$L2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93" table:style-name="ce1">
            <text:p>191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24]&gt;54;&quot;OLD&quot;;IF([.$L24]&gt;=31;&quot;Middle Age&quot;;IF([.$L2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412" table:style-name="ce1">
            <text:p>264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25]&gt;54;&quot;OLD&quot;;IF([.$L25]&gt;=31;&quot;Middle Age&quot;;IF([.$L2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84" table:style-name="ce1">
            <text:p>271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26]&gt;54;&quot;OLD&quot;;IF([.$L26]&gt;=31;&quot;Middle Age&quot;;IF([.$L2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90" table:style-name="ce1">
            <text:p>125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27]&gt;54;&quot;OLD&quot;;IF([.$L27]&gt;=31;&quot;Middle Age&quot;;IF([.$L2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1" table:style-name="ce1">
            <text:p>178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28]&gt;54;&quot;OLD&quot;;IF([.$L28]&gt;=31;&quot;Middle Age&quot;;IF([.$L28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283" table:style-name="ce1">
            <text:p>182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29]&gt;54;&quot;OLD&quot;;IF([.$L29]&gt;=31;&quot;Middle Age&quot;;IF([.$L2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299" table:style-name="ce1">
            <text:p>182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30]&gt;54;&quot;OLD&quot;;IF([.$L30]&gt;=31;&quot;Middle Age&quot;;IF([.$L3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466" table:style-name="ce1">
            <text:p>164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31]&gt;54;&quot;OLD&quot;;IF([.$L31]&gt;=31;&quot;Middle Age&quot;;IF([.$L3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73" table:style-name="ce1">
            <text:p>192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32]&gt;54;&quot;OLD&quot;;IF([.$L32]&gt;=31;&quot;Middle Age&quot;;IF([.$L3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400" table:style-name="ce1">
            <text:p>224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33]&gt;54;&quot;OLD&quot;;IF([.$L33]&gt;=31;&quot;Middle Age&quot;;IF([.$L3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42" table:style-name="ce1">
            <text:p>209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34]&gt;54;&quot;OLD&quot;;IF([.$L34]&gt;=31;&quot;Middle Age&quot;;IF([.$L3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484" table:style-name="ce1">
            <text:p>184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35]&gt;54;&quot;OLD&quot;;IF([.$L35]&gt;=31;&quot;Middle Age&quot;;IF([.$L3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91" table:style-name="ce1">
            <text:p>122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36]&gt;54;&quot;OLD&quot;;IF([.$L36]&gt;=31;&quot;Middle Age&quot;;IF([.$L36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80" table:style-name="ce1">
            <text:p>2838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37]&gt;54;&quot;OLD&quot;;IF([.$L37]&gt;=31;&quot;Middle Age&quot;;IF([.$L3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91" table:style-name="ce1">
            <text:p>178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38]&gt;54;&quot;OLD&quot;;IF([.$L38]&gt;=31;&quot;Middle Age&quot;;IF([.$L3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32" table:style-name="ce1">
            <text:p>278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39]&gt;54;&quot;OLD&quot;;IF([.$L39]&gt;=31;&quot;Middle Age&quot;;IF([.$L3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863" table:style-name="ce1">
            <text:p>268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40]&gt;54;&quot;OLD&quot;;IF([.$L40]&gt;=31;&quot;Middle Age&quot;;IF([.$L4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259" table:style-name="ce1">
            <text:p>1625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41]&gt;54;&quot;OLD&quot;;IF([.$L41]&gt;=31;&quot;Middle Age&quot;;IF([.$L4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03" table:style-name="ce1">
            <text:p>278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42]&gt;54;&quot;OLD&quot;;IF([.$L42]&gt;=31;&quot;Middle Age&quot;;IF([.$L4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47" table:style-name="ce1">
            <text:p>143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43]&gt;54;&quot;OLD&quot;;IF([.$L43]&gt;=31;&quot;Middle Age&quot;;IF([.$L4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703" table:style-name="ce1">
            <text:p>1770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44]&gt;54;&quot;OLD&quot;;IF([.$L44]&gt;=31;&quot;Middle Age&quot;;IF([.$L4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185" table:style-name="ce1">
            <text:p>171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70000" table:style-name="ce3">
            <text:p><text:s/>$1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45]&gt;54;&quot;OLD&quot;;IF([.$L45]&gt;=31;&quot;Middle Age&quot;;IF([.$L4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380" table:style-name="ce1">
            <text:p>293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46]&gt;54;&quot;OLD&quot;;IF([.$L46]&gt;=31;&quot;Middle Age&quot;;IF([.$L4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986" table:style-name="ce1">
            <text:p>239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47]&gt;54;&quot;OLD&quot;;IF([.$L47]&gt;=31;&quot;Middle Age&quot;;IF([.$L47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466" table:style-name="ce1">
            <text:p>244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8]&gt;54;&quot;OLD&quot;;IF([.$L48]&gt;=31;&quot;Middle Age&quot;;IF([.$L4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097" table:style-name="ce1">
            <text:p>290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49]&gt;54;&quot;OLD&quot;;IF([.$L49]&gt;=31;&quot;Middle Age&quot;;IF([.$L4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87" table:style-name="ce1">
            <text:p>194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50]&gt;54;&quot;OLD&quot;;IF([.$L50]&gt;=31;&quot;Middle Age&quot;;IF([.$L5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39" table:style-name="ce1">
            <text:p>149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51]&gt;54;&quot;OLD&quot;;IF([.$L51]&gt;=31;&quot;Middle Age&quot;;IF([.$L5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826" table:style-name="ce1">
            <text:p>138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52]&gt;54;&quot;OLD&quot;;IF([.$L52]&gt;=31;&quot;Middle Age&quot;;IF([.$L52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19" table:style-name="ce1">
            <text:p>206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53]&gt;54;&quot;OLD&quot;;IF([.$L53]&gt;=31;&quot;Middle Age&quot;;IF([.$L5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58" table:style-name="ce1">
            <text:p>125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54]&gt;54;&quot;OLD&quot;;IF([.$L54]&gt;=31;&quot;Middle Age&quot;;IF([.$L5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871" table:style-name="ce1">
            <text:p>248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55]&gt;54;&quot;OLD&quot;;IF([.$L55]&gt;=31;&quot;Middle Age&quot;;IF([.$L5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19" table:style-name="ce1">
            <text:p>173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56]&gt;54;&quot;OLD&quot;;IF([.$L56]&gt;=31;&quot;Middle Age&quot;;IF([.$L5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06" table:style-name="ce1">
            <text:p>289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57]&gt;54;&quot;OLD&quot;;IF([.$L57]&gt;=31;&quot;Middle Age&quot;;IF([.$L5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08" table:style-name="ce1">
            <text:p>128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58]&gt;54;&quot;OLD&quot;;IF([.$L58]&gt;=31;&quot;Middle Age&quot;;IF([.$L5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67" table:style-name="ce1">
            <text:p>2056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59]&gt;54;&quot;OLD&quot;;IF([.$L59]&gt;=31;&quot;Middle Age&quot;;IF([.$L59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02" table:style-name="ce1">
            <text:p>255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60]&gt;54;&quot;OLD&quot;;IF([.$L60]&gt;=31;&quot;Middle Age&quot;;IF([.$L6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80" table:style-name="ce1">
            <text:p>155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61]&gt;54;&quot;OLD&quot;;IF([.$L61]&gt;=31;&quot;Middle Age&quot;;IF([.$L6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85" table:style-name="ce1">
            <text:p>241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62]&gt;54;&quot;OLD&quot;;IF([.$L62]&gt;=31;&quot;Middle Age&quot;;IF([.$L6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91" table:style-name="ce1">
            <text:p>192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63]&gt;54;&quot;OLD&quot;;IF([.$L63]&gt;=31;&quot;Middle Age&quot;;IF([.$L6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13" table:style-name="ce1">
            <text:p>167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64]&gt;54;&quot;OLD&quot;;IF([.$L64]&gt;=31;&quot;Middle Age&quot;;IF([.$L6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185" table:style-name="ce1">
            <text:p>161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65]&gt;54;&quot;OLD&quot;;IF([.$L65]&gt;=31;&quot;Middle Age&quot;;IF([.$L6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27" table:style-name="ce1">
            <text:p>149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66]&gt;54;&quot;OLD&quot;;IF([.$L66]&gt;=31;&quot;Middle Age&quot;;IF([.$L6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337" table:style-name="ce1">
            <text:p>293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8" table:style-name="ce1">
            <text:p>68</text:p>
          </table:table-cell>
          <table:table-cell office:value-type="string" office:string-value="OLD" table:formula="of:=IF([.$L67]&gt;54;&quot;OLD&quot;;IF([.$L67]&gt;=31;&quot;Middle Age&quot;;IF([.$L6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355" table:style-name="ce1">
            <text:p>293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68]&gt;54;&quot;OLD&quot;;IF([.$L68]&gt;=31;&quot;Middle Age&quot;;IF([.$L6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03" table:style-name="ce1">
            <text:p>253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69]&gt;54;&quot;OLD&quot;;IF([.$L69]&gt;=31;&quot;Middle Age&quot;;IF([.$L6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13" table:style-name="ce1">
            <text:p>148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70]&gt;54;&quot;OLD&quot;;IF([.$L70]&gt;=31;&quot;Middle Age&quot;;IF([.$L7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38" table:style-name="ce1">
            <text:p>164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71]&gt;54;&quot;OLD&quot;;IF([.$L71]&gt;=31;&quot;Middle Age&quot;;IF([.$L71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238" table:style-name="ce1">
            <text:p>142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72]&gt;54;&quot;OLD&quot;;IF([.$L72]&gt;=31;&quot;Middle Age&quot;;IF([.$L7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200" table:style-name="ce1">
            <text:p>162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73]&gt;54;&quot;OLD&quot;;IF([.$L73]&gt;=31;&quot;Middle Age&quot;;IF([.$L7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857" table:style-name="ce1">
            <text:p>248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74]&gt;54;&quot;OLD&quot;;IF([.$L74]&gt;=31;&quot;Middle Age&quot;;IF([.$L7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956" table:style-name="ce1">
            <text:p>2695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75]&gt;54;&quot;OLD&quot;;IF([.$L75]&gt;=31;&quot;Middle Age&quot;;IF([.$L7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17" table:style-name="ce1">
            <text:p>145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76]&gt;54;&quot;OLD&quot;;IF([.$L76]&gt;=31;&quot;Middle Age&quot;;IF([.$L7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78" table:style-name="ce1">
            <text:p>126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77]&gt;54;&quot;OLD&quot;;IF([.$L77]&gt;=31;&quot;Middle Age&quot;;IF([.$L7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88" table:style-name="ce1">
            <text:p>161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78]&gt;54;&quot;OLD&quot;;IF([.$L78]&gt;=31;&quot;Middle Age&quot;;IF([.$L7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969" table:style-name="ce1">
            <text:p>279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79]&gt;54;&quot;OLD&quot;;IF([.$L79]&gt;=31;&quot;Middle Age&quot;;IF([.$L79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752" table:style-name="ce1">
            <text:p>157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80]&gt;54;&quot;OLD&quot;;IF([.$L80]&gt;=31;&quot;Middle Age&quot;;IF([.$L8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45" table:style-name="ce1">
            <text:p>277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81]&gt;54;&quot;OLD&quot;;IF([.$L81]&gt;=31;&quot;Middle Age&quot;;IF([.$L81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28" table:style-name="ce1">
            <text:p>208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82]&gt;54;&quot;OLD&quot;;IF([.$L82]&gt;=31;&quot;Middle Age&quot;;IF([.$L8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61" table:style-name="ce1">
            <text:p>1946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83]&gt;54;&quot;OLD&quot;;IF([.$L83]&gt;=31;&quot;Middle Age&quot;;IF([.$L8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941" table:style-name="ce1">
            <text:p>269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84]&gt;54;&quot;OLD&quot;;IF([.$L84]&gt;=31;&quot;Middle Age&quot;;IF([.$L8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412" table:style-name="ce1">
            <text:p>284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85]&gt;54;&quot;OLD&quot;;IF([.$L85]&gt;=31;&quot;Middle Age&quot;;IF([.$L8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485" table:style-name="ce1">
            <text:p>244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86]&gt;54;&quot;OLD&quot;;IF([.$L86]&gt;=31;&quot;Middle Age&quot;;IF([.$L8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514" table:style-name="ce1">
            <text:p>165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87]&gt;54;&quot;OLD&quot;;IF([.$L87]&gt;=31;&quot;Middle Age&quot;;IF([.$L87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191" table:style-name="ce1">
            <text:p>171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88]&gt;54;&quot;OLD&quot;;IF([.$L88]&gt;=31;&quot;Middle Age&quot;;IF([.$L8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08" table:style-name="ce1">
            <text:p>196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89]&gt;54;&quot;OLD&quot;;IF([.$L89]&gt;=31;&quot;Middle Age&quot;;IF([.$L8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19" table:style-name="ce1">
            <text:p>241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90]&gt;54;&quot;OLD&quot;;IF([.$L90]&gt;=31;&quot;Middle Age&quot;;IF([.$L9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458" table:style-name="ce1">
            <text:p>254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91]&gt;54;&quot;OLD&quot;;IF([.$L91]&gt;=31;&quot;Middle Age&quot;;IF([.$L9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86" table:style-name="ce1">
            <text:p>2688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92]&gt;54;&quot;OLD&quot;;IF([.$L92]&gt;=31;&quot;Middle Age&quot;;IF([.$L92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436" table:style-name="ce1">
            <text:p>284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93]&gt;54;&quot;OLD&quot;;IF([.$L93]&gt;=31;&quot;Middle Age&quot;;IF([.$L9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562" table:style-name="ce1">
            <text:p>1956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94]&gt;54;&quot;OLD&quot;;IF([.$L94]&gt;=31;&quot;Middle Age&quot;;IF([.$L9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608" table:style-name="ce1">
            <text:p>1560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95]&gt;54;&quot;OLD&quot;;IF([.$L95]&gt;=31;&quot;Middle Age&quot;;IF([.$L9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487" table:style-name="ce1">
            <text:p>164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96]&gt;54;&quot;OLD&quot;;IF([.$L96]&gt;=31;&quot;Middle Age&quot;;IF([.$L9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197" table:style-name="ce1">
            <text:p>171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97]&gt;54;&quot;OLD&quot;;IF([.$L97]&gt;=31;&quot;Middle Age&quot;;IF([.$L9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07" table:style-name="ce1">
            <text:p>125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98]&gt;54;&quot;OLD&quot;;IF([.$L98]&gt;=31;&quot;Middle Age&quot;;IF([.$L9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40" table:style-name="ce1">
            <text:p>239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99]&gt;54;&quot;OLD&quot;;IF([.$L99]&gt;=31;&quot;Middle Age&quot;;IF([.$L9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41" table:style-name="ce1">
            <text:p>194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5" table:style-name="ce1">
            <text:p>25</text:p>
          </table:table-cell>
          <table:table-cell office:value-type="string" office:string-value="Adollescent" table:formula="of:=IF([.$L100]&gt;54;&quot;OLD&quot;;IF([.$L100]&gt;=31;&quot;Middle Age&quot;;IF([.$L100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52" table:style-name="ce1">
            <text:p>268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101]&gt;54;&quot;OLD&quot;;IF([.$L101]&gt;=31;&quot;Middle Age&quot;;IF([.$L10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74" table:style-name="ce1">
            <text:p>122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102]&gt;54;&quot;OLD&quot;;IF([.$L102]&gt;=31;&quot;Middle Age&quot;;IF([.$L10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36" table:style-name="ce1">
            <text:p>202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103]&gt;54;&quot;OLD&quot;;IF([.$L103]&gt;=31;&quot;Middle Age&quot;;IF([.$L10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49" table:style-name="ce1">
            <text:p>241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104]&gt;54;&quot;OLD&quot;;IF([.$L104]&gt;=31;&quot;Middle Age&quot;;IF([.$L10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139" table:style-name="ce1">
            <text:p>261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105]&gt;54;&quot;OLD&quot;;IF([.$L105]&gt;=31;&quot;Middle Age&quot;;IF([.$L10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491" table:style-name="ce1">
            <text:p>184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106]&gt;54;&quot;OLD&quot;;IF([.$L106]&gt;=31;&quot;Middle Age&quot;;IF([.$L10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707" table:style-name="ce1">
            <text:p>227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107]&gt;54;&quot;OLD&quot;;IF([.$L107]&gt;=31;&quot;Middle Age&quot;;IF([.$L107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430" table:style-name="ce1">
            <text:p>204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108]&gt;54;&quot;OLD&quot;;IF([.$L108]&gt;=31;&quot;Middle Age&quot;;IF([.$L10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494" table:style-name="ce1">
            <text:p>274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109]&gt;54;&quot;OLD&quot;;IF([.$L109]&gt;=31;&quot;Middle Age&quot;;IF([.$L10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29" table:style-name="ce1">
            <text:p>268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110]&gt;54;&quot;OLD&quot;;IF([.$L110]&gt;=31;&quot;Middle Age&quot;;IF([.$L11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95" table:style-name="ce1">
            <text:p>283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111]&gt;54;&quot;OLD&quot;;IF([.$L111]&gt;=31;&quot;Middle Age&quot;;IF([.$L11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006" table:style-name="ce1">
            <text:p>210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112]&gt;54;&quot;OLD&quot;;IF([.$L112]&gt;=31;&quot;Middle Age&quot;;IF([.$L11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82" table:style-name="ce1">
            <text:p>146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113]&gt;54;&quot;OLD&quot;;IF([.$L113]&gt;=31;&quot;Middle Age&quot;;IF([.$L11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50" table:style-name="ce1">
            <text:p>1765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114]&gt;54;&quot;OLD&quot;;IF([.$L114]&gt;=31;&quot;Middle Age&quot;;IF([.$L11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91" table:style-name="ce1">
            <text:p>291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115]&gt;54;&quot;OLD&quot;;IF([.$L115]&gt;=31;&quot;Middle Age&quot;;IF([.$L11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030" table:style-name="ce1">
            <text:p>150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116]&gt;54;&quot;OLD&quot;;IF([.$L116]&gt;=31;&quot;Middle Age&quot;;IF([.$L116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40" table:style-name="ce1">
            <text:p>241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117]&gt;54;&quot;OLD&quot;;IF([.$L117]&gt;=31;&quot;Middle Age&quot;;IF([.$L117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496" table:style-name="ce1">
            <text:p>224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118]&gt;54;&quot;OLD&quot;;IF([.$L118]&gt;=31;&quot;Middle Age&quot;;IF([.$L11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065" table:style-name="ce1">
            <text:p>240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19]&gt;54;&quot;OLD&quot;;IF([.$L119]&gt;=31;&quot;Middle Age&quot;;IF([.$L11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914" table:style-name="ce1">
            <text:p>199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120]&gt;54;&quot;OLD&quot;;IF([.$L120]&gt;=31;&quot;Middle Age&quot;;IF([.$L12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71" table:style-name="ce1">
            <text:p>128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121]&gt;54;&quot;OLD&quot;;IF([.$L121]&gt;=31;&quot;Middle Age&quot;;IF([.$L121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988" table:style-name="ce1">
            <text:p>2298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122]&gt;54;&quot;OLD&quot;;IF([.$L122]&gt;=31;&quot;Middle Age&quot;;IF([.$L122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922" table:style-name="ce1">
            <text:p>159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50000" table:style-name="ce3">
            <text:p><text:s/>$1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123]&gt;54;&quot;OLD&quot;;IF([.$L123]&gt;=31;&quot;Middle Age&quot;;IF([.$L12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344" table:style-name="ce1">
            <text:p>123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124]&gt;54;&quot;OLD&quot;;IF([.$L124]&gt;=31;&quot;Middle Age&quot;;IF([.$L12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27" table:style-name="ce1">
            <text:p>236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125]&gt;54;&quot;OLD&quot;;IF([.$L125]&gt;=31;&quot;Middle Age&quot;;IF([.$L12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75" table:style-name="ce1">
            <text:p>277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126]&gt;54;&quot;OLD&quot;;IF([.$L126]&gt;=31;&quot;Middle Age&quot;;IF([.$L12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301" table:style-name="ce1">
            <text:p>293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27]&gt;54;&quot;OLD&quot;;IF([.$L127]&gt;=31;&quot;Middle Age&quot;;IF([.$L12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16" table:style-name="ce1">
            <text:p>1271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128]&gt;54;&quot;OLD&quot;;IF([.$L128]&gt;=31;&quot;Middle Age&quot;;IF([.$L12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472" table:style-name="ce1">
            <text:p>124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129]&gt;54;&quot;OLD&quot;;IF([.$L129]&gt;=31;&quot;Middle Age&quot;;IF([.$L12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70" table:style-name="ce1">
            <text:p>209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130]&gt;54;&quot;OLD&quot;;IF([.$L130]&gt;=31;&quot;Middle Age&quot;;IF([.$L13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18" table:style-name="ce1">
            <text:p>268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131]&gt;54;&quot;OLD&quot;;IF([.$L131]&gt;=31;&quot;Middle Age&quot;;IF([.$L13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993" table:style-name="ce1">
            <text:p>129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132]&gt;54;&quot;OLD&quot;;IF([.$L132]&gt;=31;&quot;Middle Age&quot;;IF([.$L13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92" table:style-name="ce1">
            <text:p>1419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133]&gt;54;&quot;OLD&quot;;IF([.$L133]&gt;=31;&quot;Middle Age&quot;;IF([.$L13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77" table:style-name="ce1">
            <text:p>194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34]&gt;54;&quot;OLD&quot;;IF([.$L134]&gt;=31;&quot;Middle Age&quot;;IF([.$L13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796" table:style-name="ce1">
            <text:p>267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135]&gt;54;&quot;OLD&quot;;IF([.$L135]&gt;=31;&quot;Middle Age&quot;;IF([.$L13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094" table:style-name="ce1">
            <text:p>210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136]&gt;54;&quot;OLD&quot;;IF([.$L136]&gt;=31;&quot;Middle Age&quot;;IF([.$L13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34" table:style-name="ce1">
            <text:p>122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137]&gt;54;&quot;OLD&quot;;IF([.$L137]&gt;=31;&quot;Middle Age&quot;;IF([.$L13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83" table:style-name="ce1">
            <text:p>286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138]&gt;54;&quot;OLD&quot;;IF([.$L138]&gt;=31;&quot;Middle Age&quot;;IF([.$L13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994" table:style-name="ce1">
            <text:p>179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139]&gt;54;&quot;OLD&quot;;IF([.$L139]&gt;=31;&quot;Middle Age&quot;;IF([.$L13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273" table:style-name="ce1">
            <text:p>242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140]&gt;54;&quot;OLD&quot;;IF([.$L140]&gt;=31;&quot;Middle Age&quot;;IF([.$L14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547" table:style-name="ce1">
            <text:p>265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141]&gt;54;&quot;OLD&quot;;IF([.$L141]&gt;=31;&quot;Middle Age&quot;;IF([.$L141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00" table:style-name="ce1">
            <text:p>225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42]&gt;54;&quot;OLD&quot;;IF([.$L142]&gt;=31;&quot;Middle Age&quot;;IF([.$L14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993" table:style-name="ce1">
            <text:p>239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143]&gt;54;&quot;OLD&quot;;IF([.$L143]&gt;=31;&quot;Middle Age&quot;;IF([.$L14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32" table:style-name="ce1">
            <text:p>148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144]&gt;54;&quot;OLD&quot;;IF([.$L144]&gt;=31;&quot;Middle Age&quot;;IF([.$L14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614" table:style-name="ce1">
            <text:p>166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145]&gt;54;&quot;OLD&quot;;IF([.$L145]&gt;=31;&quot;Middle Age&quot;;IF([.$L14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877" table:style-name="ce1">
            <text:p>2087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146]&gt;54;&quot;OLD&quot;;IF([.$L146]&gt;=31;&quot;Middle Age&quot;;IF([.$L14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729" table:style-name="ce1">
            <text:p>207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147]&gt;54;&quot;OLD&quot;;IF([.$L147]&gt;=31;&quot;Middle Age&quot;;IF([.$L14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464" table:style-name="ce1">
            <text:p>224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148]&gt;54;&quot;OLD&quot;;IF([.$L148]&gt;=31;&quot;Middle Age&quot;;IF([.$L14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75" table:style-name="ce1">
            <text:p>194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49]&gt;54;&quot;OLD&quot;;IF([.$L149]&gt;=31;&quot;Middle Age&quot;;IF([.$L14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75" table:style-name="ce1">
            <text:p>196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150]&gt;54;&quot;OLD&quot;;IF([.$L150]&gt;=31;&quot;Middle Age&quot;;IF([.$L15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28" table:style-name="ce1">
            <text:p>127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151]&gt;54;&quot;OLD&quot;;IF([.$L151]&gt;=31;&quot;Middle Age&quot;;IF([.$L151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154" table:style-name="ce1">
            <text:p>26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152]&gt;54;&quot;OLD&quot;;IF([.$L152]&gt;=31;&quot;Middle Age&quot;;IF([.$L15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117" table:style-name="ce1">
            <text:p>291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153]&gt;54;&quot;OLD&quot;;IF([.$L153]&gt;=31;&quot;Middle Age&quot;;IF([.$L15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5" table:style-name="ce1">
            <text:p>178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154]&gt;54;&quot;OLD&quot;;IF([.$L154]&gt;=31;&quot;Middle Age&quot;;IF([.$L15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058" table:style-name="ce1">
            <text:p>250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155]&gt;54;&quot;OLD&quot;;IF([.$L155]&gt;=31;&quot;Middle Age&quot;;IF([.$L15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26" table:style-name="ce1">
            <text:p>234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56]&gt;54;&quot;OLD&quot;;IF([.$L156]&gt;=31;&quot;Middle Age&quot;;IF([.$L15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798" table:style-name="ce1">
            <text:p>147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157]&gt;54;&quot;OLD&quot;;IF([.$L157]&gt;=31;&quot;Middle Age&quot;;IF([.$L15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664" table:style-name="ce1">
            <text:p>126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158]&gt;54;&quot;OLD&quot;;IF([.$L158]&gt;=31;&quot;Middle Age&quot;;IF([.$L15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79" table:style-name="ce1">
            <text:p>239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159]&gt;54;&quot;OLD&quot;;IF([.$L159]&gt;=31;&quot;Middle Age&quot;;IF([.$L15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605" table:style-name="ce1">
            <text:p>256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160]&gt;54;&quot;OLD&quot;;IF([.$L160]&gt;=31;&quot;Middle Age&quot;;IF([.$L16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797" table:style-name="ce1">
            <text:p>207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161]&gt;54;&quot;OLD&quot;;IF([.$L161]&gt;=31;&quot;Middle Age&quot;;IF([.$L16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980" table:style-name="ce1">
            <text:p>2198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162]&gt;54;&quot;OLD&quot;;IF([.$L162]&gt;=31;&quot;Middle Age&quot;;IF([.$L16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460" table:style-name="ce1">
            <text:p>254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163]&gt;54;&quot;OLD&quot;;IF([.$L163]&gt;=31;&quot;Middle Age&quot;;IF([.$L16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181" table:style-name="ce1">
            <text:p>291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164]&gt;54;&quot;OLD&quot;;IF([.$L164]&gt;=31;&quot;Middle Age&quot;;IF([.$L16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279" table:style-name="ce1">
            <text:p>242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165]&gt;54;&quot;OLD&quot;;IF([.$L165]&gt;=31;&quot;Middle Age&quot;;IF([.$L16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402" table:style-name="ce1">
            <text:p>224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25" table:style-name="ce1">
            <text:p>25</text:p>
          </table:table-cell>
          <table:table-cell office:value-type="string" office:string-value="Adollescent" table:formula="of:=IF([.$L166]&gt;54;&quot;OLD&quot;;IF([.$L166]&gt;=31;&quot;Middle Age&quot;;IF([.$L166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465" table:style-name="ce1">
            <text:p>154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5" table:style-name="ce1">
            <text:p>25</text:p>
          </table:table-cell>
          <table:table-cell office:value-type="string" office:string-value="Adollescent" table:formula="of:=IF([.$L167]&gt;54;&quot;OLD&quot;;IF([.$L167]&gt;=31;&quot;Middle Age&quot;;IF([.$L167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757" table:style-name="ce1">
            <text:p>267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168]&gt;54;&quot;OLD&quot;;IF([.$L168]&gt;=31;&quot;Middle Age&quot;;IF([.$L16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33" table:style-name="ce1">
            <text:p>142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169]&gt;54;&quot;OLD&quot;;IF([.$L169]&gt;=31;&quot;Middle Age&quot;;IF([.$L16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058" table:style-name="ce1">
            <text:p>140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170]&gt;54;&quot;OLD&quot;;IF([.$L170]&gt;=31;&quot;Middle Age&quot;;IF([.$L17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73" table:style-name="ce1">
            <text:p>122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171]&gt;54;&quot;OLD&quot;;IF([.$L171]&gt;=31;&quot;Middle Age&quot;;IF([.$L17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03" table:style-name="ce1">
            <text:p>1720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172]&gt;54;&quot;OLD&quot;;IF([.$L172]&gt;=31;&quot;Middle Age&quot;;IF([.$L172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44" table:style-name="ce1">
            <text:p>1814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173]&gt;54;&quot;OLD&quot;;IF([.$L173]&gt;=31;&quot;Middle Age&quot;;IF([.$L17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63" table:style-name="ce1">
            <text:p>239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174]&gt;54;&quot;OLD&quot;;IF([.$L174]&gt;=31;&quot;Middle Age&quot;;IF([.$L17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07" table:style-name="ce1">
            <text:p>179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175]&gt;54;&quot;OLD&quot;;IF([.$L175]&gt;=31;&quot;Middle Age&quot;;IF([.$L17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442" table:style-name="ce1">
            <text:p>194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176]&gt;54;&quot;OLD&quot;;IF([.$L176]&gt;=31;&quot;Middle Age&quot;;IF([.$L17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04" table:style-name="ce1">
            <text:p>175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177]&gt;54;&quot;OLD&quot;;IF([.$L177]&gt;=31;&quot;Middle Age&quot;;IF([.$L17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53" table:style-name="ce1">
            <text:p>122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178]&gt;54;&quot;OLD&quot;;IF([.$L178]&gt;=31;&quot;Middle Age&quot;;IF([.$L178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304" table:style-name="ce1">
            <text:p>273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179]&gt;54;&quot;OLD&quot;;IF([.$L179]&gt;=31;&quot;Middle Age&quot;;IF([.$L17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91" table:style-name="ce1">
            <text:p>141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60000" table:style-name="ce3">
            <text:p><text:s/>$1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180]&gt;54;&quot;OLD&quot;;IF([.$L180]&gt;=31;&quot;Middle Age&quot;;IF([.$L18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12" table:style-name="ce1">
            <text:p>122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181]&gt;54;&quot;OLD&quot;;IF([.$L181]&gt;=31;&quot;Middle Age&quot;;IF([.$L18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29" table:style-name="ce1">
            <text:p>255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182]&gt;54;&quot;OLD&quot;;IF([.$L182]&gt;=31;&quot;Middle Age&quot;;IF([.$L18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70" table:style-name="ce1">
            <text:p>221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183]&gt;54;&quot;OLD&quot;;IF([.$L183]&gt;=31;&quot;Middle Age&quot;;IF([.$L18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45" table:style-name="ce1">
            <text:p>194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184]&gt;54;&quot;OLD&quot;;IF([.$L184]&gt;=31;&quot;Middle Age&quot;;IF([.$L18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65" table:style-name="ce1">
            <text:p>152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185]&gt;54;&quot;OLD&quot;;IF([.$L185]&gt;=31;&quot;Middle Age&quot;;IF([.$L18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918" table:style-name="ce1">
            <text:p>289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186]&gt;54;&quot;OLD&quot;;IF([.$L186]&gt;=31;&quot;Middle Age&quot;;IF([.$L18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799" table:style-name="ce1">
            <text:p>157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187]&gt;54;&quot;OLD&quot;;IF([.$L187]&gt;=31;&quot;Middle Age&quot;;IF([.$L18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047" table:style-name="ce1">
            <text:p>110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188]&gt;54;&quot;OLD&quot;;IF([.$L188]&gt;=31;&quot;Middle Age&quot;;IF([.$L18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51" table:style-name="ce1">
            <text:p>181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189]&gt;54;&quot;OLD&quot;;IF([.$L189]&gt;=31;&quot;Middle Age&quot;;IF([.$L18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06" table:style-name="ce1">
            <text:p>206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190]&gt;54;&quot;OLD&quot;;IF([.$L190]&gt;=31;&quot;Middle Age&quot;;IF([.$L19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82" table:style-name="ce1">
            <text:p>194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191]&gt;54;&quot;OLD&quot;;IF([.$L191]&gt;=31;&quot;Middle Age&quot;;IF([.$L19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89" table:style-name="ce1">
            <text:p>164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192]&gt;54;&quot;OLD&quot;;IF([.$L192]&gt;=31;&quot;Middle Age&quot;;IF([.$L19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944" table:style-name="ce1">
            <text:p>269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193]&gt;54;&quot;OLD&quot;;IF([.$L193]&gt;=31;&quot;Middle Age&quot;;IF([.$L19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682" table:style-name="ce1">
            <text:p>156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194]&gt;54;&quot;OLD&quot;;IF([.$L194]&gt;=31;&quot;Middle Age&quot;;IF([.$L19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032" table:style-name="ce1">
            <text:p>260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195]&gt;54;&quot;OLD&quot;;IF([.$L195]&gt;=31;&quot;Middle Age&quot;;IF([.$L19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3" table:style-name="ce1">
            <text:p>178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196]&gt;54;&quot;OLD&quot;;IF([.$L196]&gt;=31;&quot;Middle Age&quot;;IF([.$L19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559" table:style-name="ce1">
            <text:p>2555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5" table:style-name="ce1">
            <text:p>25</text:p>
          </table:table-cell>
          <table:table-cell office:value-type="string" office:string-value="Adollescent" table:formula="of:=IF([.$L197]&gt;54;&quot;OLD&quot;;IF([.$L197]&gt;=31;&quot;Middle Age&quot;;IF([.$L197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209" table:style-name="ce1">
            <text:p>1620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198]&gt;54;&quot;OLD&quot;;IF([.$L198]&gt;=31;&quot;Middle Age&quot;;IF([.$L19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147" table:style-name="ce1">
            <text:p>111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199]&gt;54;&quot;OLD&quot;;IF([.$L199]&gt;=31;&quot;Middle Age&quot;;IF([.$L199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214" table:style-name="ce1">
            <text:p>152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200]&gt;54;&quot;OLD&quot;;IF([.$L200]&gt;=31;&quot;Middle Age&quot;;IF([.$L20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453" table:style-name="ce1">
            <text:p>114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201]&gt;54;&quot;OLD&quot;;IF([.$L201]&gt;=31;&quot;Middle Age&quot;;IF([.$L20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584" table:style-name="ce1">
            <text:p>245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202]&gt;54;&quot;OLD&quot;;IF([.$L202]&gt;=31;&quot;Middle Age&quot;;IF([.$L20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85" table:style-name="ce1">
            <text:p>12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203]&gt;54;&quot;OLD&quot;;IF([.$L203]&gt;=31;&quot;Middle Age&quot;;IF([.$L20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26" table:style-name="ce1">
            <text:p>186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204]&gt;54;&quot;OLD&quot;;IF([.$L204]&gt;=31;&quot;Middle Age&quot;;IF([.$L20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298" table:style-name="ce1">
            <text:p>292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205]&gt;54;&quot;OLD&quot;;IF([.$L205]&gt;=31;&quot;Middle Age&quot;;IF([.$L20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842" table:style-name="ce1">
            <text:p>248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206]&gt;54;&quot;OLD&quot;;IF([.$L206]&gt;=31;&quot;Middle Age&quot;;IF([.$L20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57" table:style-name="ce1">
            <text:p>156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207]&gt;54;&quot;OLD&quot;;IF([.$L207]&gt;=31;&quot;Middle Age&quot;;IF([.$L20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415" table:style-name="ce1">
            <text:p>1141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208]&gt;54;&quot;OLD&quot;;IF([.$L208]&gt;=31;&quot;Middle Age&quot;;IF([.$L20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729" table:style-name="ce1">
            <text:p>287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209]&gt;54;&quot;OLD&quot;;IF([.$L209]&gt;=31;&quot;Middle Age&quot;;IF([.$L209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33" table:style-name="ce1">
            <text:p>226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10]&gt;54;&quot;OLD&quot;;IF([.$L210]&gt;=31;&quot;Middle Age&quot;;IF([.$L21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49" table:style-name="ce1">
            <text:p>256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211]&gt;54;&quot;OLD&quot;;IF([.$L211]&gt;=31;&quot;Middle Age&quot;;IF([.$L21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69" table:style-name="ce1">
            <text:p>146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212]&gt;54;&quot;OLD&quot;;IF([.$L212]&gt;=31;&quot;Middle Age&quot;;IF([.$L21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99" table:style-name="ce1">
            <text:p>192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213]&gt;54;&quot;OLD&quot;;IF([.$L213]&gt;=31;&quot;Middle Age&quot;;IF([.$L21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46" table:style-name="ce1">
            <text:p>2094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214]&gt;54;&quot;OLD&quot;;IF([.$L214]&gt;=31;&quot;Middle Age&quot;;IF([.$L21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451" table:style-name="ce1">
            <text:p>114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215]&gt;54;&quot;OLD&quot;;IF([.$L215]&gt;=31;&quot;Middle Age&quot;;IF([.$L21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53" table:style-name="ce1">
            <text:p>255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216]&gt;54;&quot;OLD&quot;;IF([.$L216]&gt;=31;&quot;Middle Age&quot;;IF([.$L216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951" table:style-name="ce1">
            <text:p>279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217]&gt;54;&quot;OLD&quot;;IF([.$L217]&gt;=31;&quot;Middle Age&quot;;IF([.$L21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026" table:style-name="ce1">
            <text:p>250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218]&gt;54;&quot;OLD&quot;;IF([.$L218]&gt;=31;&quot;Middle Age&quot;;IF([.$L21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73" table:style-name="ce1">
            <text:p>1367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5" table:style-name="ce1">
            <text:p>25</text:p>
          </table:table-cell>
          <table:table-cell office:value-type="string" office:string-value="Adollescent" table:formula="of:=IF([.$L219]&gt;54;&quot;OLD&quot;;IF([.$L219]&gt;=31;&quot;Middle Age&quot;;IF([.$L21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43" table:style-name="ce1">
            <text:p>160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220]&gt;54;&quot;OLD&quot;;IF([.$L220]&gt;=31;&quot;Middle Age&quot;;IF([.$L22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399" table:style-name="ce1">
            <text:p>223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221]&gt;54;&quot;OLD&quot;;IF([.$L221]&gt;=31;&quot;Middle Age&quot;;IF([.$L221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96" table:style-name="ce1">
            <text:p>276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222]&gt;54;&quot;OLD&quot;;IF([.$L222]&gt;=31;&quot;Middle Age&quot;;IF([.$L22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13" table:style-name="ce1">
            <text:p>253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223]&gt;54;&quot;OLD&quot;;IF([.$L223]&gt;=31;&quot;Middle Age&quot;;IF([.$L22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813" table:style-name="ce1">
            <text:p>138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224]&gt;54;&quot;OLD&quot;;IF([.$L224]&gt;=31;&quot;Middle Age&quot;;IF([.$L22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711" table:style-name="ce1">
            <text:p>1871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225]&gt;54;&quot;OLD&quot;;IF([.$L225]&gt;=31;&quot;Middle Age&quot;;IF([.$L22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50" table:style-name="ce1">
            <text:p>196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226]&gt;54;&quot;OLD&quot;;IF([.$L226]&gt;=31;&quot;Middle Age&quot;;IF([.$L22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35" table:style-name="ce1">
            <text:p>141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227]&gt;54;&quot;OLD&quot;;IF([.$L227]&gt;=31;&quot;Middle Age&quot;;IF([.$L22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33" table:style-name="ce1">
            <text:p>128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228]&gt;54;&quot;OLD&quot;;IF([.$L228]&gt;=31;&quot;Middle Age&quot;;IF([.$L22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49" table:style-name="ce1">
            <text:p>268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229]&gt;54;&quot;OLD&quot;;IF([.$L229]&gt;=31;&quot;Middle Age&quot;;IF([.$L22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62" table:style-name="ce1">
            <text:p>209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230]&gt;54;&quot;OLD&quot;;IF([.$L230]&gt;=31;&quot;Middle Age&quot;;IF([.$L23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15" table:style-name="ce1">
            <text:p>2891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231]&gt;54;&quot;OLD&quot;;IF([.$L231]&gt;=31;&quot;Middle Age&quot;;IF([.$L23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830" table:style-name="ce1">
            <text:p>228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232]&gt;54;&quot;OLD&quot;;IF([.$L232]&gt;=31;&quot;Middle Age&quot;;IF([.$L23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777" table:style-name="ce1">
            <text:p>147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233]&gt;54;&quot;OLD&quot;;IF([.$L233]&gt;=31;&quot;Middle Age&quot;;IF([.$L23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591" table:style-name="ce1">
            <text:p>125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234]&gt;54;&quot;OLD&quot;;IF([.$L234]&gt;=31;&quot;Middle Age&quot;;IF([.$L23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74" table:style-name="ce1">
            <text:p>241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235]&gt;54;&quot;OLD&quot;;IF([.$L235]&gt;=31;&quot;Middle Age&quot;;IF([.$L235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611" table:style-name="ce1">
            <text:p>2461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236]&gt;54;&quot;OLD&quot;;IF([.$L236]&gt;=31;&quot;Middle Age&quot;;IF([.$L23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40" table:style-name="ce1">
            <text:p>113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$L237]&gt;54;&quot;OLD&quot;;IF([.$L237]&gt;=31;&quot;Middle Age&quot;;IF([.$L237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93" table:style-name="ce1">
            <text:p>256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238]&gt;54;&quot;OLD&quot;;IF([.$L238]&gt;=31;&quot;Middle Age&quot;;IF([.$L23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55" table:style-name="ce1">
            <text:p>255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239]&gt;54;&quot;OLD&quot;;IF([.$L239]&gt;=31;&quot;Middle Age&quot;;IF([.$L239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006" table:style-name="ce1">
            <text:p>220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240]&gt;54;&quot;OLD&quot;;IF([.$L240]&gt;=31;&quot;Middle Age&quot;;IF([.$L24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060" table:style-name="ce1">
            <text:p>2006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241]&gt;54;&quot;OLD&quot;;IF([.$L241]&gt;=31;&quot;Middle Age&quot;;IF([.$L24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702" table:style-name="ce1">
            <text:p>177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42]&gt;54;&quot;OLD&quot;;IF([.$L242]&gt;=31;&quot;Middle Age&quot;;IF([.$L24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03" table:style-name="ce1">
            <text:p>125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243]&gt;54;&quot;OLD&quot;;IF([.$L243]&gt;=31;&quot;Middle Age&quot;;IF([.$L243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08" table:style-name="ce1">
            <text:p>2390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244]&gt;54;&quot;OLD&quot;;IF([.$L244]&gt;=31;&quot;Middle Age&quot;;IF([.$L24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27" table:style-name="ce1">
            <text:p>225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245]&gt;54;&quot;OLD&quot;;IF([.$L245]&gt;=31;&quot;Middle Age&quot;;IF([.$L24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057" table:style-name="ce1">
            <text:p>190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246]&gt;54;&quot;OLD&quot;;IF([.$L246]&gt;=31;&quot;Middle Age&quot;;IF([.$L24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494" table:style-name="ce1">
            <text:p>184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247]&gt;54;&quot;OLD&quot;;IF([.$L247]&gt;=31;&quot;Middle Age&quot;;IF([.$L24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49" table:style-name="ce1">
            <text:p>112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248]&gt;54;&quot;OLD&quot;;IF([.$L248]&gt;=31;&quot;Middle Age&quot;;IF([.$L24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68" table:style-name="ce1">
            <text:p>215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249]&gt;54;&quot;OLD&quot;;IF([.$L249]&gt;=31;&quot;Middle Age&quot;;IF([.$L24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81" table:style-name="ce1">
            <text:p>139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250]&gt;54;&quot;OLD&quot;;IF([.$L250]&gt;=31;&quot;Middle Age&quot;;IF([.$L25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32" table:style-name="ce1">
            <text:p>234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51]&gt;54;&quot;OLD&quot;;IF([.$L251]&gt;=31;&quot;Middle Age&quot;;IF([.$L25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31" table:style-name="ce1">
            <text:p>229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78" table:style-name="ce1">
            <text:p>78</text:p>
          </table:table-cell>
          <table:table-cell office:value-type="string" office:string-value="OLD" table:formula="of:=IF([.$L252]&gt;54;&quot;OLD&quot;;IF([.$L252]&gt;=31;&quot;Middle Age&quot;;IF([.$L252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72" table:style-name="ce1">
            <text:p>181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253]&gt;54;&quot;OLD&quot;;IF([.$L253]&gt;=31;&quot;Middle Age&quot;;IF([.$L25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66" table:style-name="ce1">
            <text:p>126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254]&gt;54;&quot;OLD&quot;;IF([.$L254]&gt;=31;&quot;Middle Age&quot;;IF([.$L25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98" table:style-name="ce1">
            <text:p>205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255]&gt;54;&quot;OLD&quot;;IF([.$L255]&gt;=31;&quot;Middle Age&quot;;IF([.$L25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375" table:style-name="ce1">
            <text:p>213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256]&gt;54;&quot;OLD&quot;;IF([.$L256]&gt;=31;&quot;Middle Age&quot;;IF([.$L25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839" table:style-name="ce1">
            <text:p>208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257]&gt;54;&quot;OLD&quot;;IF([.$L257]&gt;=31;&quot;Middle Age&quot;;IF([.$L25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738" table:style-name="ce1">
            <text:p>217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258]&gt;54;&quot;OLD&quot;;IF([.$L258]&gt;=31;&quot;Middle Age&quot;;IF([.$L25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64" table:style-name="ce1">
            <text:p>141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259]&gt;54;&quot;OLD&quot;;IF([.$L259]&gt;=31;&quot;Middle Age&quot;;IF([.$L25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193" table:style-name="ce1">
            <text:p>141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260]&gt;54;&quot;OLD&quot;;IF([.$L260]&gt;=31;&quot;Middle Age&quot;;IF([.$L26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05" table:style-name="ce1">
            <text:p>127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50000" table:style-name="ce3">
            <text:p><text:s/>$1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61]&gt;54;&quot;OLD&quot;;IF([.$L261]&gt;=31;&quot;Middle Age&quot;;IF([.$L26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72" table:style-name="ce1">
            <text:p>226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262]&gt;54;&quot;OLD&quot;;IF([.$L262]&gt;=31;&quot;Middle Age&quot;;IF([.$L26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19" table:style-name="ce1">
            <text:p>262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263]&gt;54;&quot;OLD&quot;;IF([.$L263]&gt;=31;&quot;Middle Age&quot;;IF([.$L26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468" table:style-name="ce1">
            <text:p>284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264]&gt;54;&quot;OLD&quot;;IF([.$L264]&gt;=31;&quot;Middle Age&quot;;IF([.$L26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19" table:style-name="ce1">
            <text:p>234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265]&gt;54;&quot;OLD&quot;;IF([.$L265]&gt;=31;&quot;Middle Age&quot;;IF([.$L26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64" table:style-name="ce1">
            <text:p>179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66]&gt;54;&quot;OLD&quot;;IF([.$L266]&gt;=31;&quot;Middle Age&quot;;IF([.$L26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19" table:style-name="ce1">
            <text:p>209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267]&gt;54;&quot;OLD&quot;;IF([.$L267]&gt;=31;&quot;Middle Age&quot;;IF([.$L26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27" table:style-name="ce1">
            <text:p>209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268]&gt;54;&quot;OLD&quot;;IF([.$L268]&gt;=31;&quot;Middle Age&quot;;IF([.$L26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133" table:style-name="ce1">
            <text:p>131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269]&gt;54;&quot;OLD&quot;;IF([.$L269]&gt;=31;&quot;Middle Age&quot;;IF([.$L26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26" table:style-name="ce1">
            <text:p>196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270]&gt;54;&quot;OLD&quot;;IF([.$L270]&gt;=31;&quot;Middle Age&quot;;IF([.$L27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039" table:style-name="ce1">
            <text:p>210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71]&gt;54;&quot;OLD&quot;;IF([.$L271]&gt;=31;&quot;Middle Age&quot;;IF([.$L27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31" table:style-name="ce1">
            <text:p>122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272]&gt;54;&quot;OLD&quot;;IF([.$L272]&gt;=31;&quot;Middle Age&quot;;IF([.$L27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65" table:style-name="ce1">
            <text:p>256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273]&gt;54;&quot;OLD&quot;;IF([.$L273]&gt;=31;&quot;Middle Age&quot;;IF([.$L273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061" table:style-name="ce1">
            <text:p>240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274]&gt;54;&quot;OLD&quot;;IF([.$L274]&gt;=31;&quot;Middle Age&quot;;IF([.$L27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79" table:style-name="ce1">
            <text:p>268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275]&gt;54;&quot;OLD&quot;;IF([.$L275]&gt;=31;&quot;Middle Age&quot;;IF([.$L27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84" table:style-name="ce1">
            <text:p>122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276]&gt;54;&quot;OLD&quot;;IF([.$L276]&gt;=31;&quot;Middle Age&quot;;IF([.$L27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54" table:style-name="ce1">
            <text:p>266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77]&gt;54;&quot;OLD&quot;;IF([.$L277]&gt;=31;&quot;Middle Age&quot;;IF([.$L27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45" table:style-name="ce1">
            <text:p>145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278]&gt;54;&quot;OLD&quot;;IF([.$L278]&gt;=31;&quot;Middle Age&quot;;IF([.$L27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201" table:style-name="ce1">
            <text:p>242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79]&gt;54;&quot;OLD&quot;;IF([.$L279]&gt;=31;&quot;Middle Age&quot;;IF([.$L27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625" table:style-name="ce1">
            <text:p>206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280]&gt;54;&quot;OLD&quot;;IF([.$L280]&gt;=31;&quot;Middle Age&quot;;IF([.$L28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390" table:style-name="ce1">
            <text:p>163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281]&gt;54;&quot;OLD&quot;;IF([.$L281]&gt;=31;&quot;Middle Age&quot;;IF([.$L28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04" table:style-name="ce1">
            <text:p>148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282]&gt;54;&quot;OLD&quot;;IF([.$L282]&gt;=31;&quot;Middle Age&quot;;IF([.$L28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29" table:style-name="ce1">
            <text:p>126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283]&gt;54;&quot;OLD&quot;;IF([.$L283]&gt;=31;&quot;Middle Age&quot;;IF([.$L28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96" table:style-name="ce1">
            <text:p>146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284]&gt;54;&quot;OLD&quot;;IF([.$L284]&gt;=31;&quot;Middle Age&quot;;IF([.$L28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05" table:style-name="ce1">
            <text:p>220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285]&gt;54;&quot;OLD&quot;;IF([.$L285]&gt;=31;&quot;Middle Age&quot;;IF([.$L28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544" table:style-name="ce1">
            <text:p>145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286]&gt;54;&quot;OLD&quot;;IF([.$L286]&gt;=31;&quot;Middle Age&quot;;IF([.$L28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12" table:style-name="ce1">
            <text:p>143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287]&gt;54;&quot;OLD&quot;;IF([.$L287]&gt;=31;&quot;Middle Age&quot;;IF([.$L28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20" table:style-name="ce1">
            <text:p>2912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288]&gt;54;&quot;OLD&quot;;IF([.$L288]&gt;=31;&quot;Middle Age&quot;;IF([.$L28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87" table:style-name="ce1">
            <text:p>241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289]&gt;54;&quot;OLD&quot;;IF([.$L289]&gt;=31;&quot;Middle Age&quot;;IF([.$L28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758" table:style-name="ce1">
            <text:p>157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290]&gt;54;&quot;OLD&quot;;IF([.$L290]&gt;=31;&quot;Middle Age&quot;;IF([.$L29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094" table:style-name="ce1">
            <text:p>290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291]&gt;54;&quot;OLD&quot;;IF([.$L291]&gt;=31;&quot;Middle Age&quot;;IF([.$L29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19" table:style-name="ce1">
            <text:p>283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292]&gt;54;&quot;OLD&quot;;IF([.$L292]&gt;=31;&quot;Middle Age&quot;;IF([.$L29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06" table:style-name="ce1">
            <text:p>164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293]&gt;54;&quot;OLD&quot;;IF([.$L293]&gt;=31;&quot;Middle Age&quot;;IF([.$L29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23" table:style-name="ce1">
            <text:p>209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294]&gt;54;&quot;OLD&quot;;IF([.$L294]&gt;=31;&quot;Middle Age&quot;;IF([.$L29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78" table:style-name="ce1">
            <text:p>113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295]&gt;54;&quot;OLD&quot;;IF([.$L295]&gt;=31;&quot;Middle Age&quot;;IF([.$L29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51" table:style-name="ce1">
            <text:p>208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296]&gt;54;&quot;OLD&quot;;IF([.$L296]&gt;=31;&quot;Middle Age&quot;;IF([.$L29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7" table:style-name="ce1">
            <text:p>215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297]&gt;54;&quot;OLD&quot;;IF([.$L297]&gt;=31;&quot;Middle Age&quot;;IF([.$L29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63" table:style-name="ce1">
            <text:p>266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298]&gt;54;&quot;OLD&quot;;IF([.$L298]&gt;=31;&quot;Middle Age&quot;;IF([.$L29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896" table:style-name="ce1">
            <text:p>118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299]&gt;54;&quot;OLD&quot;;IF([.$L299]&gt;=31;&quot;Middle Age&quot;;IF([.$L29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189" table:style-name="ce1">
            <text:p>141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300]&gt;54;&quot;OLD&quot;;IF([.$L300]&gt;=31;&quot;Middle Age&quot;;IF([.$L30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136" table:style-name="ce1">
            <text:p>131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301]&gt;54;&quot;OLD&quot;;IF([.$L301]&gt;=31;&quot;Middle Age&quot;;IF([.$L30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906" table:style-name="ce1">
            <text:p>259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302]&gt;54;&quot;OLD&quot;;IF([.$L302]&gt;=31;&quot;Middle Age&quot;;IF([.$L30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26" table:style-name="ce1">
            <text:p>179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303]&gt;54;&quot;OLD&quot;;IF([.$L303]&gt;=31;&quot;Middle Age&quot;;IF([.$L30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928" table:style-name="ce1">
            <text:p>269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304]&gt;54;&quot;OLD&quot;;IF([.$L304]&gt;=31;&quot;Middle Age&quot;;IF([.$L304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97" table:style-name="ce1">
            <text:p>208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305]&gt;54;&quot;OLD&quot;;IF([.$L305]&gt;=31;&quot;Middle Age&quot;;IF([.$L30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207" table:style-name="ce1">
            <text:p>282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306]&gt;54;&quot;OLD&quot;;IF([.$L306]&gt;=31;&quot;Middle Age&quot;;IF([.$L30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23" table:style-name="ce1">
            <text:p>2592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307]&gt;54;&quot;OLD&quot;;IF([.$L307]&gt;=31;&quot;Middle Age&quot;;IF([.$L30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308]&gt;54;&quot;OLD&quot;;IF([.$L308]&gt;=31;&quot;Middle Age&quot;;IF([.$L30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74" table:style-name="ce1">
            <text:p>209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309]&gt;54;&quot;OLD&quot;;IF([.$L309]&gt;=31;&quot;Middle Age&quot;;IF([.$L30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758" table:style-name="ce1">
            <text:p>287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310]&gt;54;&quot;OLD&quot;;IF([.$L310]&gt;=31;&quot;Middle Age&quot;;IF([.$L31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81" table:style-name="ce1">
            <text:p>113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311]&gt;54;&quot;OLD&quot;;IF([.$L311]&gt;=31;&quot;Middle Age&quot;;IF([.$L31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22" table:style-name="ce1">
            <text:p>175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312]&gt;54;&quot;OLD&quot;;IF([.$L312]&gt;=31;&quot;Middle Age&quot;;IF([.$L31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207" table:style-name="ce1">
            <text:p>212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313]&gt;54;&quot;OLD&quot;;IF([.$L313]&gt;=31;&quot;Middle Age&quot;;IF([.$L31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102" table:style-name="ce1">
            <text:p>281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314]&gt;54;&quot;OLD&quot;;IF([.$L314]&gt;=31;&quot;Middle Age&quot;;IF([.$L314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105" table:style-name="ce1">
            <text:p>231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315]&gt;54;&quot;OLD&quot;;IF([.$L315]&gt;=31;&quot;Middle Age&quot;;IF([.$L31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740" table:style-name="ce1">
            <text:p>187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316]&gt;54;&quot;OLD&quot;;IF([.$L316]&gt;=31;&quot;Middle Age&quot;;IF([.$L31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213" table:style-name="ce1">
            <text:p>212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317]&gt;54;&quot;OLD&quot;;IF([.$L317]&gt;=31;&quot;Middle Age&quot;;IF([.$L31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52" table:style-name="ce1">
            <text:p>173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318]&gt;54;&quot;OLD&quot;;IF([.$L318]&gt;=31;&quot;Middle Age&quot;;IF([.$L31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154" table:style-name="ce1">
            <text:p>14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319]&gt;54;&quot;OLD&quot;;IF([.$L319]&gt;=31;&quot;Middle Age&quot;;IF([.$L31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066" table:style-name="ce1">
            <text:p>190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320]&gt;54;&quot;OLD&quot;;IF([.$L320]&gt;=31;&quot;Middle Age&quot;;IF([.$L32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386" table:style-name="ce1">
            <text:p>113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321]&gt;54;&quot;OLD&quot;;IF([.$L321]&gt;=31;&quot;Middle Age&quot;;IF([.$L32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28" table:style-name="ce1">
            <text:p>202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322]&gt;54;&quot;OLD&quot;;IF([.$L322]&gt;=31;&quot;Middle Age&quot;;IF([.$L32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675" table:style-name="ce1">
            <text:p>166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60000" table:style-name="ce3">
            <text:p><text:s/>$1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323]&gt;54;&quot;OLD&quot;;IF([.$L323]&gt;=31;&quot;Middle Age&quot;;IF([.$L32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10" table:style-name="ce1">
            <text:p>164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324]&gt;54;&quot;OLD&quot;;IF([.$L324]&gt;=31;&quot;Middle Age&quot;;IF([.$L32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60" table:style-name="ce1">
            <text:p>2776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325]&gt;54;&quot;OLD&quot;;IF([.$L325]&gt;=31;&quot;Middle Age&quot;;IF([.$L32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30" table:style-name="ce1">
            <text:p>229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26]&gt;54;&quot;OLD&quot;;IF([.$L326]&gt;=31;&quot;Middle Age&quot;;IF([.$L32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780" table:style-name="ce1">
            <text:p>2378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327]&gt;54;&quot;OLD&quot;;IF([.$L327]&gt;=31;&quot;Middle Age&quot;;IF([.$L32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94" table:style-name="ce1">
            <text:p>209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328]&gt;54;&quot;OLD&quot;;IF([.$L328]&gt;=31;&quot;Middle Age&quot;;IF([.$L328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79" table:style-name="ce1">
            <text:p>2837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329]&gt;54;&quot;OLD&quot;;IF([.$L329]&gt;=31;&quot;Middle Age&quot;;IF([.$L32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865" table:style-name="ce1">
            <text:p>148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330]&gt;54;&quot;OLD&quot;;IF([.$L330]&gt;=31;&quot;Middle Age&quot;;IF([.$L33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63" table:style-name="ce1">
            <text:p>126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331]&gt;54;&quot;OLD&quot;;IF([.$L331]&gt;=31;&quot;Middle Age&quot;;IF([.$L33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898" table:style-name="ce1">
            <text:p>248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332]&gt;54;&quot;OLD&quot;;IF([.$L332]&gt;=31;&quot;Middle Age&quot;;IF([.$L33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508" table:style-name="ce1">
            <text:p>195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333]&gt;54;&quot;OLD&quot;;IF([.$L333]&gt;=31;&quot;Middle Age&quot;;IF([.$L333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489" table:style-name="ce1">
            <text:p>114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334]&gt;54;&quot;OLD&quot;;IF([.$L334]&gt;=31;&quot;Middle Age&quot;;IF([.$L33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60" table:style-name="ce1">
            <text:p>181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335]&gt;54;&quot;OLD&quot;;IF([.$L335]&gt;=31;&quot;Middle Age&quot;;IF([.$L33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241" table:style-name="ce1">
            <text:p>252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336]&gt;54;&quot;OLD&quot;;IF([.$L336]&gt;=31;&quot;Middle Age&quot;;IF([.$L33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69" table:style-name="ce1">
            <text:p>243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337]&gt;54;&quot;OLD&quot;;IF([.$L337]&gt;=31;&quot;Middle Age&quot;;IF([.$L33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65" table:style-name="ce1">
            <text:p>271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338]&gt;54;&quot;OLD&quot;;IF([.$L338]&gt;=31;&quot;Middle Age&quot;;IF([.$L33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424" table:style-name="ce1">
            <text:p>2942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339]&gt;54;&quot;OLD&quot;;IF([.$L339]&gt;=31;&quot;Middle Age&quot;;IF([.$L33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926" table:style-name="ce1">
            <text:p>159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340]&gt;54;&quot;OLD&quot;;IF([.$L340]&gt;=31;&quot;Middle Age&quot;;IF([.$L34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54" table:style-name="ce1">
            <text:p>145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341]&gt;54;&quot;OLD&quot;;IF([.$L341]&gt;=31;&quot;Middle Age&quot;;IF([.$L34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468" table:style-name="ce1">
            <text:p>1646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342]&gt;54;&quot;OLD&quot;;IF([.$L342]&gt;=31;&quot;Middle Age&quot;;IF([.$L342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74" table:style-name="ce1">
            <text:p>191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343]&gt;54;&quot;OLD&quot;;IF([.$L343]&gt;=31;&quot;Middle Age&quot;;IF([.$L34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183" table:style-name="ce1">
            <text:p>191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344]&gt;54;&quot;OLD&quot;;IF([.$L344]&gt;=31;&quot;Middle Age&quot;;IF([.$L34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83" table:style-name="ce1">
            <text:p>136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345]&gt;54;&quot;OLD&quot;;IF([.$L345]&gt;=31;&quot;Middle Age&quot;;IF([.$L34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8" table:style-name="ce1">
            <text:p>1784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346]&gt;54;&quot;OLD&quot;;IF([.$L346]&gt;=31;&quot;Middle Age&quot;;IF([.$L34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894" table:style-name="ce1">
            <text:p>178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347]&gt;54;&quot;OLD&quot;;IF([.$L347]&gt;=31;&quot;Middle Age&quot;;IF([.$L34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51" table:style-name="ce1">
            <text:p>256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348]&gt;54;&quot;OLD&quot;;IF([.$L348]&gt;=31;&quot;Middle Age&quot;;IF([.$L34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36" table:style-name="ce1">
            <text:p>229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349]&gt;54;&quot;OLD&quot;;IF([.$L349]&gt;=31;&quot;Middle Age&quot;;IF([.$L34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915" table:style-name="ce1">
            <text:p>2391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350]&gt;54;&quot;OLD&quot;;IF([.$L350]&gt;=31;&quot;Middle Age&quot;;IF([.$L35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21" table:style-name="ce1">
            <text:p>241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351]&gt;54;&quot;OLD&quot;;IF([.$L351]&gt;=31;&quot;Middle Age&quot;;IF([.$L351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78" table:style-name="ce1">
            <text:p>278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352]&gt;54;&quot;OLD&quot;;IF([.$L352]&gt;=31;&quot;Middle Age&quot;;IF([.$L352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572" table:style-name="ce1">
            <text:p>135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353]&gt;54;&quot;OLD&quot;;IF([.$L353]&gt;=31;&quot;Middle Age&quot;;IF([.$L35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941" table:style-name="ce1">
            <text:p>279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354]&gt;54;&quot;OLD&quot;;IF([.$L354]&gt;=31;&quot;Middle Age&quot;;IF([.$L35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354" table:style-name="ce1">
            <text:p>263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55]&gt;54;&quot;OLD&quot;;IF([.$L355]&gt;=31;&quot;Middle Age&quot;;IF([.$L35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785" table:style-name="ce1">
            <text:p>147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356]&gt;54;&quot;OLD&quot;;IF([.$L356]&gt;=31;&quot;Middle Age&quot;;IF([.$L35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38" table:style-name="ce1">
            <text:p>172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357]&gt;54;&quot;OLD&quot;;IF([.$L357]&gt;=31;&quot;Middle Age&quot;;IF([.$L35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08" table:style-name="ce1">
            <text:p>236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50000" table:style-name="ce3">
            <text:p><text:s/>$15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358]&gt;54;&quot;OLD&quot;;IF([.$L358]&gt;=31;&quot;Middle Age&quot;;IF([.$L35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38" table:style-name="ce1">
            <text:p>225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359]&gt;54;&quot;OLD&quot;;IF([.$L359]&gt;=31;&quot;Middle Age&quot;;IF([.$L35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332" table:style-name="ce1">
            <text:p>123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360]&gt;54;&quot;OLD&quot;;IF([.$L360]&gt;=31;&quot;Middle Age&quot;;IF([.$L36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230" table:style-name="ce1">
            <text:p>172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361]&gt;54;&quot;OLD&quot;;IF([.$L361]&gt;=31;&quot;Middle Age&quot;;IF([.$L361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082" table:style-name="ce1">
            <text:p>130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362]&gt;54;&quot;OLD&quot;;IF([.$L362]&gt;=31;&quot;Middle Age&quot;;IF([.$L36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18" table:style-name="ce1">
            <text:p>225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363]&gt;54;&quot;OLD&quot;;IF([.$L363]&gt;=31;&quot;Middle Age&quot;;IF([.$L36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687" table:style-name="ce1">
            <text:p>136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364]&gt;54;&quot;OLD&quot;;IF([.$L364]&gt;=31;&quot;Middle Age&quot;;IF([.$L36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71" table:style-name="ce1">
            <text:p>235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365]&gt;54;&quot;OLD&quot;;IF([.$L365]&gt;=31;&quot;Middle Age&quot;;IF([.$L36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05" table:style-name="ce1">
            <text:p>193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66]&gt;54;&quot;OLD&quot;;IF([.$L366]&gt;=31;&quot;Middle Age&quot;;IF([.$L36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36" table:style-name="ce1">
            <text:p>226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67]&gt;54;&quot;OLD&quot;;IF([.$L367]&gt;=31;&quot;Middle Age&quot;;IF([.$L36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310" table:style-name="ce1">
            <text:p>173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368]&gt;54;&quot;OLD&quot;;IF([.$L368]&gt;=31;&quot;Middle Age&quot;;IF([.$L36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133" table:style-name="ce1">
            <text:p>121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369]&gt;54;&quot;OLD&quot;;IF([.$L369]&gt;=31;&quot;Middle Age&quot;;IF([.$L36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18" table:style-name="ce1">
            <text:p>259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370]&gt;54;&quot;OLD&quot;;IF([.$L370]&gt;=31;&quot;Middle Age&quot;;IF([.$L37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752" table:style-name="ce1">
            <text:p>257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371]&gt;54;&quot;OLD&quot;;IF([.$L371]&gt;=31;&quot;Middle Age&quot;;IF([.$L37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324" table:style-name="ce1">
            <text:p>1732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372]&gt;54;&quot;OLD&quot;;IF([.$L372]&gt;=31;&quot;Middle Age&quot;;IF([.$L37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918" table:style-name="ce1">
            <text:p>229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373]&gt;54;&quot;OLD&quot;;IF([.$L373]&gt;=31;&quot;Middle Age&quot;;IF([.$L37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10" table:style-name="ce1">
            <text:p>125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374]&gt;54;&quot;OLD&quot;;IF([.$L374]&gt;=31;&quot;Middle Age&quot;;IF([.$L37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12" table:style-name="ce1">
            <text:p>255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375]&gt;54;&quot;OLD&quot;;IF([.$L375]&gt;=31;&quot;Middle Age&quot;;IF([.$L37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79" table:style-name="ce1">
            <text:p>161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76]&gt;54;&quot;OLD&quot;;IF([.$L376]&gt;=31;&quot;Middle Age&quot;;IF([.$L37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28" table:style-name="ce1">
            <text:p>156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89" table:style-name="ce1">
            <text:p>89</text:p>
          </table:table-cell>
          <table:table-cell office:value-type="string" office:string-value="OLD" table:formula="of:=IF([.$L377]&gt;54;&quot;OLD&quot;;IF([.$L377]&gt;=31;&quot;Middle Age&quot;;IF([.$L37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77" table:style-name="ce1">
            <text:p>209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378]&gt;54;&quot;OLD&quot;;IF([.$L378]&gt;=31;&quot;Middle Age&quot;;IF([.$L37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40" table:style-name="ce1">
            <text:p>181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379]&gt;54;&quot;OLD&quot;;IF([.$L379]&gt;=31;&quot;Middle Age&quot;;IF([.$L37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417" table:style-name="ce1">
            <text:p>204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380]&gt;54;&quot;OLD&quot;;IF([.$L380]&gt;=31;&quot;Middle Age&quot;;IF([.$L38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267" table:style-name="ce1">
            <text:p>1826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381]&gt;54;&quot;OLD&quot;;IF([.$L381]&gt;=31;&quot;Middle Age&quot;;IF([.$L38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20" table:style-name="ce1">
            <text:p>1362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382]&gt;54;&quot;OLD&quot;;IF([.$L382]&gt;=31;&quot;Middle Age&quot;;IF([.$L382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74" table:style-name="ce1">
            <text:p>229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383]&gt;54;&quot;OLD&quot;;IF([.$L383]&gt;=31;&quot;Middle Age&quot;;IF([.$L38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586" table:style-name="ce1">
            <text:p>135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384]&gt;54;&quot;OLD&quot;;IF([.$L384]&gt;=31;&quot;Middle Age&quot;;IF([.$L38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78" table:style-name="ce1">
            <text:p>179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385]&gt;54;&quot;OLD&quot;;IF([.$L385]&gt;=31;&quot;Middle Age&quot;;IF([.$L38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581" table:style-name="ce1">
            <text:p>125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386]&gt;54;&quot;OLD&quot;;IF([.$L386]&gt;=31;&quot;Middle Age&quot;;IF([.$L386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18" table:style-name="ce1">
            <text:p>180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387]&gt;54;&quot;OLD&quot;;IF([.$L387]&gt;=31;&quot;Middle Age&quot;;IF([.$L38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57" table:style-name="ce1">
            <text:p>289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388]&gt;54;&quot;OLD&quot;;IF([.$L388]&gt;=31;&quot;Middle Age&quot;;IF([.$L38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690" table:style-name="ce1">
            <text:p>136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389]&gt;54;&quot;OLD&quot;;IF([.$L389]&gt;=31;&quot;Middle Age&quot;;IF([.$L38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568" table:style-name="ce1">
            <text:p>125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390]&gt;54;&quot;OLD&quot;;IF([.$L390]&gt;=31;&quot;Middle Age&quot;;IF([.$L39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122" table:style-name="ce1">
            <text:p>131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391]&gt;54;&quot;OLD&quot;;IF([.$L391]&gt;=31;&quot;Middle Age&quot;;IF([.$L39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184" table:style-name="ce1">
            <text:p>211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92]&gt;54;&quot;OLD&quot;;IF([.$L392]&gt;=31;&quot;Middle Age&quot;;IF([.$L39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150" table:style-name="ce1">
            <text:p>2615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393]&gt;54;&quot;OLD&quot;;IF([.$L393]&gt;=31;&quot;Middle Age&quot;;IF([.$L39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51" table:style-name="ce1">
            <text:p>241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394]&gt;54;&quot;OLD&quot;;IF([.$L394]&gt;=31;&quot;Middle Age&quot;;IF([.$L39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62" table:style-name="ce1">
            <text:p>239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395]&gt;54;&quot;OLD&quot;;IF([.$L395]&gt;=31;&quot;Middle Age&quot;;IF([.$L39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793" table:style-name="ce1">
            <text:p>177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96]&gt;54;&quot;OLD&quot;;IF([.$L396]&gt;=31;&quot;Middle Age&quot;;IF([.$L39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926" table:style-name="ce1">
            <text:p>149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97]&gt;54;&quot;OLD&quot;;IF([.$L397]&gt;=31;&quot;Middle Age&quot;;IF([.$L39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163" table:style-name="ce1">
            <text:p>161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398]&gt;54;&quot;OLD&quot;;IF([.$L398]&gt;=31;&quot;Middle Age&quot;;IF([.$L39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365" table:style-name="ce1">
            <text:p>213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399]&gt;54;&quot;OLD&quot;;IF([.$L399]&gt;=31;&quot;Middle Age&quot;;IF([.$L39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71" table:style-name="ce1">
            <text:p>277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400]&gt;54;&quot;OLD&quot;;IF([.$L400]&gt;=31;&quot;Middle Age&quot;;IF([.$L40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167" table:style-name="ce1">
            <text:p>2616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401]&gt;54;&quot;OLD&quot;;IF([.$L401]&gt;=31;&quot;Middle Age&quot;;IF([.$L40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792" table:style-name="ce1">
            <text:p>257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402]&gt;54;&quot;OLD&quot;;IF([.$L402]&gt;=31;&quot;Middle Age&quot;;IF([.$L40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555" table:style-name="ce1">
            <text:p>115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80" table:style-name="ce1">
            <text:p>80</text:p>
          </table:table-cell>
          <table:table-cell office:value-type="string" office:string-value="OLD" table:formula="of:=IF([.$L403]&gt;54;&quot;OLD&quot;;IF([.$L403]&gt;=31;&quot;Middle Age&quot;;IF([.$L40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381" table:style-name="ce1">
            <text:p>223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404]&gt;54;&quot;OLD&quot;;IF([.$L404]&gt;=31;&quot;Middle Age&quot;;IF([.$L40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82" table:style-name="ce1">
            <text:p>178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405]&gt;54;&quot;OLD&quot;;IF([.$L405]&gt;=31;&quot;Middle Age&quot;;IF([.$L40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74" table:style-name="ce1">
            <text:p>221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406]&gt;54;&quot;OLD&quot;;IF([.$L406]&gt;=31;&quot;Middle Age&quot;;IF([.$L40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439" table:style-name="ce1">
            <text:p>2243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407]&gt;54;&quot;OLD&quot;;IF([.$L407]&gt;=31;&quot;Middle Age&quot;;IF([.$L40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12" table:style-name="ce1">
            <text:p>18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408]&gt;54;&quot;OLD&quot;;IF([.$L408]&gt;=31;&quot;Middle Age&quot;;IF([.$L40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582" table:style-name="ce1">
            <text:p>275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409]&gt;54;&quot;OLD&quot;;IF([.$L409]&gt;=31;&quot;Middle Age&quot;;IF([.$L40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744" table:style-name="ce1">
            <text:p>127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410]&gt;54;&quot;OLD&quot;;IF([.$L410]&gt;=31;&quot;Middle Age&quot;;IF([.$L41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821" table:style-name="ce1">
            <text:p>2282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411]&gt;54;&quot;OLD&quot;;IF([.$L411]&gt;=31;&quot;Middle Age&quot;;IF([.$L41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171" table:style-name="ce1">
            <text:p>201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12]&gt;54;&quot;OLD&quot;;IF([.$L412]&gt;=31;&quot;Middle Age&quot;;IF([.$L41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413]&gt;54;&quot;OLD&quot;;IF([.$L413]&gt;=31;&quot;Middle Age&quot;;IF([.$L41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053" table:style-name="ce1">
            <text:p>200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414]&gt;54;&quot;OLD&quot;;IF([.$L414]&gt;=31;&quot;Middle Age&quot;;IF([.$L41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266" table:style-name="ce1">
            <text:p>252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415]&gt;54;&quot;OLD&quot;;IF([.$L415]&gt;=31;&quot;Middle Age&quot;;IF([.$L41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60" table:style-name="ce1">
            <text:p>179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416]&gt;54;&quot;OLD&quot;;IF([.$L416]&gt;=31;&quot;Middle Age&quot;;IF([.$L41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61" table:style-name="ce1">
            <text:p>139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417]&gt;54;&quot;OLD&quot;;IF([.$L417]&gt;=31;&quot;Middle Age&quot;;IF([.$L41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97" table:style-name="ce1">
            <text:p>118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418]&gt;54;&quot;OLD&quot;;IF([.$L418]&gt;=31;&quot;Middle Age&quot;;IF([.$L41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39" table:style-name="ce1">
            <text:p>111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419]&gt;54;&quot;OLD&quot;;IF([.$L419]&gt;=31;&quot;Middle Age&quot;;IF([.$L41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576" table:style-name="ce1">
            <text:p>1157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420]&gt;54;&quot;OLD&quot;;IF([.$L420]&gt;=31;&quot;Middle Age&quot;;IF([.$L42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55" table:style-name="ce1">
            <text:p>192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421]&gt;54;&quot;OLD&quot;;IF([.$L421]&gt;=31;&quot;Middle Age&quot;;IF([.$L42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53" table:style-name="ce1">
            <text:p>181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422]&gt;54;&quot;OLD&quot;;IF([.$L422]&gt;=31;&quot;Middle Age&quot;;IF([.$L42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547" table:style-name="ce1">
            <text:p>145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423]&gt;54;&quot;OLD&quot;;IF([.$L423]&gt;=31;&quot;Middle Age&quot;;IF([.$L42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01" table:style-name="ce1">
            <text:p>2490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424]&gt;54;&quot;OLD&quot;;IF([.$L424]&gt;=31;&quot;Middle Age&quot;;IF([.$L42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169" table:style-name="ce1">
            <text:p>271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425]&gt;54;&quot;OLD&quot;;IF([.$L425]&gt;=31;&quot;Middle Age&quot;;IF([.$L42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05" table:style-name="ce1">
            <text:p>148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426]&gt;54;&quot;OLD&quot;;IF([.$L426]&gt;=31;&quot;Middle Age&quot;;IF([.$L42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22" table:style-name="ce1">
            <text:p>158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427]&gt;54;&quot;OLD&quot;;IF([.$L427]&gt;=31;&quot;Middle Age&quot;;IF([.$L42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389" table:style-name="ce1">
            <text:p>193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428]&gt;54;&quot;OLD&quot;;IF([.$L428]&gt;=31;&quot;Middle Age&quot;;IF([.$L42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048" table:style-name="ce1">
            <text:p>1704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429]&gt;54;&quot;OLD&quot;;IF([.$L429]&gt;=31;&quot;Middle Age&quot;;IF([.$L42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204" table:style-name="ce1">
            <text:p>222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430]&gt;54;&quot;OLD&quot;;IF([.$L430]&gt;=31;&quot;Middle Age&quot;;IF([.$L43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18" table:style-name="ce1">
            <text:p>127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431]&gt;54;&quot;OLD&quot;;IF([.$L431]&gt;=31;&quot;Middle Age&quot;;IF([.$L43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019" table:style-name="ce1">
            <text:p>150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432]&gt;54;&quot;OLD&quot;;IF([.$L432]&gt;=31;&quot;Middle Age&quot;;IF([.$L43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488" table:style-name="ce1">
            <text:p>284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433]&gt;54;&quot;OLD&quot;;IF([.$L433]&gt;=31;&quot;Middle Age&quot;;IF([.$L43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891" table:style-name="ce1">
            <text:p>218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434]&gt;54;&quot;OLD&quot;;IF([.$L434]&gt;=31;&quot;Middle Age&quot;;IF([.$L43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14" table:style-name="ce1">
            <text:p>278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435]&gt;54;&quot;OLD&quot;;IF([.$L435]&gt;=31;&quot;Middle Age&quot;;IF([.$L43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75" table:style-name="ce1">
            <text:p>221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436]&gt;54;&quot;OLD&quot;;IF([.$L436]&gt;=31;&quot;Middle Age&quot;;IF([.$L43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447" table:style-name="ce1">
            <text:p>294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8" table:style-name="ce1">
            <text:p>68</text:p>
          </table:table-cell>
          <table:table-cell office:value-type="string" office:string-value="OLD" table:formula="of:=IF([.$L437]&gt;54;&quot;OLD&quot;;IF([.$L437]&gt;=31;&quot;Middle Age&quot;;IF([.$L43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784" table:style-name="ce1">
            <text:p>197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438]&gt;54;&quot;OLD&quot;;IF([.$L438]&gt;=31;&quot;Middle Age&quot;;IF([.$L43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24" table:style-name="ce1">
            <text:p>2782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439]&gt;54;&quot;OLD&quot;;IF([.$L439]&gt;=31;&quot;Middle Age&quot;;IF([.$L439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093" table:style-name="ce1">
            <text:p>240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440]&gt;54;&quot;OLD&quot;;IF([.$L440]&gt;=31;&quot;Middle Age&quot;;IF([.$L44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18" table:style-name="ce1">
            <text:p>196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441]&gt;54;&quot;OLD&quot;;IF([.$L441]&gt;=31;&quot;Middle Age&quot;;IF([.$L44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61" table:style-name="ce1">
            <text:p>2156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442]&gt;54;&quot;OLD&quot;;IF([.$L442]&gt;=31;&quot;Middle Age&quot;;IF([.$L44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061" table:style-name="ce1">
            <text:p>110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443]&gt;54;&quot;OLD&quot;;IF([.$L443]&gt;=31;&quot;Middle Age&quot;;IF([.$L44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51" table:style-name="ce1">
            <text:p>266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444]&gt;54;&quot;OLD&quot;;IF([.$L444]&gt;=31;&quot;Middle Age&quot;;IF([.$L44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108" table:style-name="ce1">
            <text:p>211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445]&gt;54;&quot;OLD&quot;;IF([.$L445]&gt;=31;&quot;Middle Age&quot;;IF([.$L44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731" table:style-name="ce1">
            <text:p>127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446]&gt;54;&quot;OLD&quot;;IF([.$L446]&gt;=31;&quot;Middle Age&quot;;IF([.$L44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447]&gt;54;&quot;OLD&quot;;IF([.$L447]&gt;=31;&quot;Middle Age&quot;;IF([.$L44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78" table:style-name="ce1">
            <text:p>142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448]&gt;54;&quot;OLD&quot;;IF([.$L448]&gt;=31;&quot;Middle Age&quot;;IF([.$L44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711" table:style-name="ce1">
            <text:p>2071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449]&gt;54;&quot;OLD&quot;;IF([.$L449]&gt;=31;&quot;Middle Age&quot;;IF([.$L44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83" table:style-name="ce1">
            <text:p>113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50]&gt;54;&quot;OLD&quot;;IF([.$L450]&gt;=31;&quot;Middle Age&quot;;IF([.$L45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497" table:style-name="ce1">
            <text:p>124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451]&gt;54;&quot;OLD&quot;;IF([.$L451]&gt;=31;&quot;Middle Age&quot;;IF([.$L45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559" table:style-name="ce1">
            <text:p>1655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452]&gt;54;&quot;OLD&quot;;IF([.$L452]&gt;=31;&quot;Middle Age&quot;;IF([.$L45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585" table:style-name="ce1">
            <text:p>11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453]&gt;54;&quot;OLD&quot;;IF([.$L453]&gt;=31;&quot;Middle Age&quot;;IF([.$L45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77" table:style-name="ce1">
            <text:p>202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454]&gt;54;&quot;OLD&quot;;IF([.$L454]&gt;=31;&quot;Middle Age&quot;;IF([.$L45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765" table:style-name="ce1">
            <text:p>267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455]&gt;54;&quot;OLD&quot;;IF([.$L455]&gt;=31;&quot;Middle Age&quot;;IF([.$L45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389" table:style-name="ce1">
            <text:p>123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456]&gt;54;&quot;OLD&quot;;IF([.$L456]&gt;=31;&quot;Middle Age&quot;;IF([.$L45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585" table:style-name="ce1">
            <text:p>13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457]&gt;54;&quot;OLD&quot;;IF([.$L457]&gt;=31;&quot;Middle Age&quot;;IF([.$L45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385" table:style-name="ce1">
            <text:p>263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458]&gt;54;&quot;OLD&quot;;IF([.$L458]&gt;=31;&quot;Middle Age&quot;;IF([.$L45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36" table:style-name="ce1">
            <text:p>122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459]&gt;54;&quot;OLD&quot;;IF([.$L459]&gt;=31;&quot;Middle Age&quot;;IF([.$L45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60" table:style-name="ce1">
            <text:p>215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460]&gt;54;&quot;OLD&quot;;IF([.$L460]&gt;=31;&quot;Middle Age&quot;;IF([.$L46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4" table:style-name="ce1">
            <text:p>215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Pacific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461]&gt;54;&quot;OLD&quot;;IF([.$L461]&gt;=31;&quot;Middle Age&quot;;IF([.$L46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62" table:style-name="ce1">
            <text:p>1366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462]&gt;54;&quot;OLD&quot;;IF([.$L462]&gt;=31;&quot;Middle Age&quot;;IF([.$L46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089" table:style-name="ce1">
            <text:p>130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63]&gt;54;&quot;OLD&quot;;IF([.$L463]&gt;=31;&quot;Middle Age&quot;;IF([.$L46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791" table:style-name="ce1">
            <text:p>147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464]&gt;54;&quot;OLD&quot;;IF([.$L464]&gt;=31;&quot;Middle Age&quot;;IF([.$L46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31" table:style-name="ce1">
            <text:p>193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465]&gt;54;&quot;OLD&quot;;IF([.$L465]&gt;=31;&quot;Middle Age&quot;;IF([.$L46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754" table:style-name="ce1">
            <text:p>177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66]&gt;54;&quot;OLD&quot;;IF([.$L466]&gt;=31;&quot;Middle Age&quot;;IF([.$L46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49" table:style-name="ce1">
            <text:p>111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467]&gt;54;&quot;OLD&quot;;IF([.$L467]&gt;=31;&quot;Middle Age&quot;;IF([.$L46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549" table:style-name="ce1">
            <text:p>165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468]&gt;54;&quot;OLD&quot;;IF([.$L468]&gt;=31;&quot;Middle Age&quot;;IF([.$L46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305" table:style-name="ce1">
            <text:p>243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69]&gt;54;&quot;OLD&quot;;IF([.$L469]&gt;=31;&quot;Middle Age&quot;;IF([.$L46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253" table:style-name="ce1">
            <text:p>182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470]&gt;54;&quot;OLD&quot;;IF([.$L470]&gt;=31;&quot;Middle Age&quot;;IF([.$L47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147" table:style-name="ce1">
            <text:p>201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471]&gt;54;&quot;OLD&quot;;IF([.$L471]&gt;=31;&quot;Middle Age&quot;;IF([.$L47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12" table:style-name="ce1">
            <text:p>156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472]&gt;54;&quot;OLD&quot;;IF([.$L472]&gt;=31;&quot;Middle Age&quot;;IF([.$L472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323" table:style-name="ce1">
            <text:p>2832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473]&gt;54;&quot;OLD&quot;;IF([.$L473]&gt;=31;&quot;Middle Age&quot;;IF([.$L47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34" table:style-name="ce1">
            <text:p>2263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474]&gt;54;&quot;OLD&quot;;IF([.$L474]&gt;=31;&quot;Middle Age&quot;;IF([.$L47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665" table:style-name="ce1">
            <text:p>156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475]&gt;54;&quot;OLD&quot;;IF([.$L475]&gt;=31;&quot;Middle Age&quot;;IF([.$L47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585" table:style-name="ce1">
            <text:p>27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476]&gt;54;&quot;OLD&quot;;IF([.$L476]&gt;=31;&quot;Middle Age&quot;;IF([.$L47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748" table:style-name="ce1">
            <text:p>197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477]&gt;54;&quot;OLD&quot;;IF([.$L477]&gt;=31;&quot;Middle Age&quot;;IF([.$L47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974" table:style-name="ce1">
            <text:p>219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478]&gt;54;&quot;OLD&quot;;IF([.$L478]&gt;=31;&quot;Middle Age&quot;;IF([.$L47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32" table:style-name="ce1">
            <text:p>140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479]&gt;54;&quot;OLD&quot;;IF([.$L479]&gt;=31;&quot;Middle Age&quot;;IF([.$L47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10" table:style-name="ce1">
            <text:p>226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480]&gt;54;&quot;OLD&quot;;IF([.$L480]&gt;=31;&quot;Middle Age&quot;;IF([.$L48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984" table:style-name="ce1">
            <text:p>269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481]&gt;54;&quot;OLD&quot;;IF([.$L481]&gt;=31;&quot;Middle Age&quot;;IF([.$L48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294" table:style-name="ce1">
            <text:p>182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82]&gt;54;&quot;OLD&quot;;IF([.$L482]&gt;=31;&quot;Middle Age&quot;;IF([.$L48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564" table:style-name="ce1">
            <text:p>285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483]&gt;54;&quot;OLD&quot;;IF([.$L483]&gt;=31;&quot;Middle Age&quot;;IF([.$L48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521" table:style-name="ce1">
            <text:p>285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484]&gt;54;&quot;OLD&quot;;IF([.$L484]&gt;=31;&quot;Middle Age&quot;;IF([.$L48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450" table:style-name="ce1">
            <text:p>154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$L485]&gt;54;&quot;OLD&quot;;IF([.$L485]&gt;=31;&quot;Middle Age&quot;;IF([.$L48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681" table:style-name="ce1">
            <text:p>256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486]&gt;54;&quot;OLD&quot;;IF([.$L486]&gt;=31;&quot;Middle Age&quot;;IF([.$L48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91" table:style-name="ce1">
            <text:p>194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487]&gt;54;&quot;OLD&quot;;IF([.$L487]&gt;=31;&quot;Middle Age&quot;;IF([.$L48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415" table:style-name="ce1">
            <text:p>2641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Europe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488]&gt;54;&quot;OLD&quot;;IF([.$L488]&gt;=31;&quot;Middle Age&quot;;IF([.$L48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21" table:style-name="ce1">
            <text:p>1282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489]&gt;54;&quot;OLD&quot;;IF([.$L489]&gt;=31;&quot;Middle Age&quot;;IF([.$L48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29" table:style-name="ce1">
            <text:p>156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490]&gt;54;&quot;OLD&quot;;IF([.$L490]&gt;=31;&quot;Middle Age&quot;;IF([.$L49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835" table:style-name="ce1">
            <text:p>278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491]&gt;54;&quot;OLD&quot;;IF([.$L491]&gt;=31;&quot;Middle Age&quot;;IF([.$L49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38" table:style-name="ce1">
            <text:p>117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492]&gt;54;&quot;OLD&quot;;IF([.$L492]&gt;=31;&quot;Middle Age&quot;;IF([.$L49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065" table:style-name="ce1">
            <text:p>250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493]&gt;54;&quot;OLD&quot;;IF([.$L493]&gt;=31;&quot;Middle Age&quot;;IF([.$L49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38" table:style-name="ce1">
            <text:p>262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494]&gt;54;&quot;OLD&quot;;IF([.$L494]&gt;=31;&quot;Middle Age&quot;;IF([.$L49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707" table:style-name="ce1">
            <text:p>237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495]&gt;54;&quot;OLD&quot;;IF([.$L495]&gt;=31;&quot;Middle Age&quot;;IF([.$L49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50" table:style-name="ce1">
            <text:p>276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496]&gt;54;&quot;OLD&quot;;IF([.$L496]&gt;=31;&quot;Middle Age&quot;;IF([.$L49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81" table:style-name="ce1">
            <text:p>249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497]&gt;54;&quot;OLD&quot;;IF([.$L497]&gt;=31;&quot;Middle Age&quot;;IF([.$L49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78" table:style-name="ce1">
            <text:p>206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498]&gt;54;&quot;OLD&quot;;IF([.$L498]&gt;=31;&quot;Middle Age&quot;;IF([.$L49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302" table:style-name="ce1">
            <text:p>1530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499]&gt;54;&quot;OLD&quot;;IF([.$L499]&gt;=31;&quot;Middle Age&quot;;IF([.$L49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012" table:style-name="ce1">
            <text:p>26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500]&gt;54;&quot;OLD&quot;;IF([.$L500]&gt;=31;&quot;Middle Age&quot;;IF([.$L50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575" table:style-name="ce1">
            <text:p>265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501]&gt;54;&quot;OLD&quot;;IF([.$L501]&gt;=31;&quot;Middle Age&quot;;IF([.$L50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59" table:style-name="ce1">
            <text:p>155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502]&gt;54;&quot;OLD&quot;;IF([.$L502]&gt;=31;&quot;Middle Age&quot;;IF([.$L50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35" table:style-name="ce1">
            <text:p>192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503]&gt;54;&quot;OLD&quot;;IF([.$L503]&gt;=31;&quot;Middle Age&quot;;IF([.$L50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75" table:style-name="ce1">
            <text:p>152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504]&gt;54;&quot;OLD&quot;;IF([.$L504]&gt;=31;&quot;Middle Age&quot;;IF([.$L50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39" table:style-name="ce1">
            <text:p>2033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505]&gt;54;&quot;OLD&quot;;IF([.$L505]&gt;=31;&quot;Middle Age&quot;;IF([.$L50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405" table:style-name="ce1">
            <text:p>254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506]&gt;54;&quot;OLD&quot;;IF([.$L506]&gt;=31;&quot;Middle Age&quot;;IF([.$L50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940" table:style-name="ce1">
            <text:p>159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507]&gt;54;&quot;OLD&quot;;IF([.$L507]&gt;=31;&quot;Middle Age&quot;;IF([.$L50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074" table:style-name="ce1">
            <text:p>250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508]&gt;54;&quot;OLD&quot;;IF([.$L508]&gt;=31;&quot;Middle Age&quot;;IF([.$L50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738" table:style-name="ce1">
            <text:p>247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509]&gt;54;&quot;OLD&quot;;IF([.$L509]&gt;=31;&quot;Middle Age&quot;;IF([.$L50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337" table:style-name="ce1">
            <text:p>163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510]&gt;54;&quot;OLD&quot;;IF([.$L510]&gt;=31;&quot;Middle Age&quot;;IF([.$L51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57" table:style-name="ce1">
            <text:p>243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511]&gt;54;&quot;OLD&quot;;IF([.$L511]&gt;=31;&quot;Middle Age&quot;;IF([.$L51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13" table:style-name="ce1">
            <text:p>186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512]&gt;54;&quot;OLD&quot;;IF([.$L512]&gt;=31;&quot;Middle Age&quot;;IF([.$L51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07" table:style-name="ce1">
            <text:p>122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513]&gt;54;&quot;OLD&quot;;IF([.$L513]&gt;=31;&quot;Middle Age&quot;;IF([.$L51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52" table:style-name="ce1">
            <text:p>180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514]&gt;54;&quot;OLD&quot;;IF([.$L514]&gt;=31;&quot;Middle Age&quot;;IF([.$L51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53" table:style-name="ce1">
            <text:p>133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515]&gt;54;&quot;OLD&quot;;IF([.$L515]&gt;=31;&quot;Middle Age&quot;;IF([.$L51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99" table:style-name="ce1">
            <text:p>193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516]&gt;54;&quot;OLD&quot;;IF([.$L516]&gt;=31;&quot;Middle Age&quot;;IF([.$L51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54" table:style-name="ce1">
            <text:p>16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517]&gt;54;&quot;OLD&quot;;IF([.$L517]&gt;=31;&quot;Middle Age&quot;;IF([.$L51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19" table:style-name="ce1">
            <text:p>222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518]&gt;54;&quot;OLD&quot;;IF([.$L518]&gt;=31;&quot;Middle Age&quot;;IF([.$L51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69" table:style-name="ce1">
            <text:p>172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519]&gt;54;&quot;OLD&quot;;IF([.$L519]&gt;=31;&quot;Middle Age&quot;;IF([.$L51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520]&gt;54;&quot;OLD&quot;;IF([.$L520]&gt;=31;&quot;Middle Age&quot;;IF([.$L52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740" table:style-name="ce1">
            <text:p>157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521]&gt;54;&quot;OLD&quot;;IF([.$L521]&gt;=31;&quot;Middle Age&quot;;IF([.$L52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638" table:style-name="ce1">
            <text:p>276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522]&gt;54;&quot;OLD&quot;;IF([.$L522]&gt;=31;&quot;Middle Age&quot;;IF([.$L52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76" table:style-name="ce1">
            <text:p>189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523]&gt;54;&quot;OLD&quot;;IF([.$L523]&gt;=31;&quot;Middle Age&quot;;IF([.$L52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13" table:style-name="ce1">
            <text:p>194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524]&gt;54;&quot;OLD&quot;;IF([.$L524]&gt;=31;&quot;Middle Age&quot;;IF([.$L52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283" table:style-name="ce1">
            <text:p>132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525]&gt;54;&quot;OLD&quot;;IF([.$L525]&gt;=31;&quot;Middle Age&quot;;IF([.$L52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471" table:style-name="ce1">
            <text:p>174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526]&gt;54;&quot;OLD&quot;;IF([.$L526]&gt;=31;&quot;Middle Age&quot;;IF([.$L52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91" table:style-name="ce1">
            <text:p>167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527]&gt;54;&quot;OLD&quot;;IF([.$L527]&gt;=31;&quot;Middle Age&quot;;IF([.$L527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382" table:style-name="ce1">
            <text:p>153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528]&gt;54;&quot;OLD&quot;;IF([.$L528]&gt;=31;&quot;Middle Age&quot;;IF([.$L52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41" table:style-name="ce1">
            <text:p>116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529]&gt;54;&quot;OLD&quot;;IF([.$L529]&gt;=31;&quot;Middle Age&quot;;IF([.$L52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935" table:style-name="ce1">
            <text:p>1193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530]&gt;54;&quot;OLD&quot;;IF([.$L530]&gt;=31;&quot;Middle Age&quot;;IF([.$L53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233" table:style-name="ce1">
            <text:p>132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531]&gt;54;&quot;OLD&quot;;IF([.$L531]&gt;=31;&quot;Middle Age&quot;;IF([.$L531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09" table:style-name="ce1">
            <text:p>2590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532]&gt;54;&quot;OLD&quot;;IF([.$L532]&gt;=31;&quot;Middle Age&quot;;IF([.$L532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92" table:style-name="ce1">
            <text:p>140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533]&gt;54;&quot;OLD&quot;;IF([.$L533]&gt;=31;&quot;Middle Age&quot;;IF([.$L533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43" table:style-name="ce1">
            <text:p>291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534]&gt;54;&quot;OLD&quot;;IF([.$L534]&gt;=31;&quot;Middle Age&quot;;IF([.$L53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941" table:style-name="ce1">
            <text:p>249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535]&gt;54;&quot;OLD&quot;;IF([.$L535]&gt;=31;&quot;Middle Age&quot;;IF([.$L53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637" table:style-name="ce1">
            <text:p>246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536]&gt;54;&quot;OLD&quot;;IF([.$L536]&gt;=31;&quot;Middle Age&quot;;IF([.$L53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893" table:style-name="ce1">
            <text:p>238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537]&gt;54;&quot;OLD&quot;;IF([.$L537]&gt;=31;&quot;Middle Age&quot;;IF([.$L53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907" table:style-name="ce1">
            <text:p>139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538]&gt;54;&quot;OLD&quot;;IF([.$L538]&gt;=31;&quot;Middle Age&quot;;IF([.$L53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900" table:style-name="ce1">
            <text:p>149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539]&gt;54;&quot;OLD&quot;;IF([.$L539]&gt;=31;&quot;Middle Age&quot;;IF([.$L53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62" table:style-name="ce1">
            <text:p>112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540]&gt;54;&quot;OLD&quot;;IF([.$L540]&gt;=31;&quot;Middle Age&quot;;IF([.$L54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94" table:style-name="ce1">
            <text:p>222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541]&gt;54;&quot;OLD&quot;;IF([.$L541]&gt;=31;&quot;Middle Age&quot;;IF([.$L54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195" table:style-name="ce1">
            <text:p>121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542]&gt;54;&quot;OLD&quot;;IF([.$L542]&gt;=31;&quot;Middle Age&quot;;IF([.$L54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75" table:style-name="ce1">
            <text:p>253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543]&gt;54;&quot;OLD&quot;;IF([.$L543]&gt;=31;&quot;Middle Age&quot;;IF([.$L54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143" table:style-name="ce1">
            <text:p>111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544]&gt;54;&quot;OLD&quot;;IF([.$L544]&gt;=31;&quot;Middle Age&quot;;IF([.$L54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545]&gt;54;&quot;OLD&quot;;IF([.$L545]&gt;=31;&quot;Middle Age&quot;;IF([.$L54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97" table:style-name="ce1">
            <text:p>243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546]&gt;54;&quot;OLD&quot;;IF([.$L546]&gt;=31;&quot;Middle Age&quot;;IF([.$L54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758" table:style-name="ce1">
            <text:p>197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547]&gt;54;&quot;OLD&quot;;IF([.$L547]&gt;=31;&quot;Middle Age&quot;;IF([.$L547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529" table:style-name="ce1">
            <text:p>155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548]&gt;54;&quot;OLD&quot;;IF([.$L548]&gt;=31;&quot;Middle Age&quot;;IF([.$L54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884" table:style-name="ce1">
            <text:p>198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549]&gt;54;&quot;OLD&quot;;IF([.$L549]&gt;=31;&quot;Middle Age&quot;;IF([.$L549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74" table:style-name="ce1">
            <text:p>186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550]&gt;54;&quot;OLD&quot;;IF([.$L550]&gt;=31;&quot;Middle Age&quot;;IF([.$L55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453" table:style-name="ce1">
            <text:p>134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551]&gt;54;&quot;OLD&quot;;IF([.$L551]&gt;=31;&quot;Middle Age&quot;;IF([.$L55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63" table:style-name="ce1">
            <text:p>140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552]&gt;54;&quot;OLD&quot;;IF([.$L552]&gt;=31;&quot;Middle Age&quot;;IF([.$L55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393" table:style-name="ce1">
            <text:p>273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553]&gt;54;&quot;OLD&quot;;IF([.$L553]&gt;=31;&quot;Middle Age&quot;;IF([.$L55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417" table:style-name="ce1">
            <text:p>144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554]&gt;54;&quot;OLD&quot;;IF([.$L554]&gt;=31;&quot;Middle Age&quot;;IF([.$L55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33" table:style-name="ce1">
            <text:p>175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$L555]&gt;54;&quot;OLD&quot;;IF([.$L555]&gt;=31;&quot;Middle Age&quot;;IF([.$L55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580" table:style-name="ce1">
            <text:p>185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556]&gt;54;&quot;OLD&quot;;IF([.$L556]&gt;=31;&quot;Middle Age&quot;;IF([.$L55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025" table:style-name="ce1">
            <text:p>1702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557]&gt;54;&quot;OLD&quot;;IF([.$L557]&gt;=31;&quot;Middle Age&quot;;IF([.$L55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558]&gt;54;&quot;OLD&quot;;IF([.$L558]&gt;=31;&quot;Middle Age&quot;;IF([.$L55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725" table:style-name="ce1">
            <text:p>247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559]&gt;54;&quot;OLD&quot;;IF([.$L559]&gt;=31;&quot;Middle Age&quot;;IF([.$L55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00" table:style-name="ce1">
            <text:p>232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560]&gt;54;&quot;OLD&quot;;IF([.$L560]&gt;=31;&quot;Middle Age&quot;;IF([.$L56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95" table:style-name="ce1">
            <text:p>158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561]&gt;54;&quot;OLD&quot;;IF([.$L561]&gt;=31;&quot;Middle Age&quot;;IF([.$L56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77" table:style-name="ce1">
            <text:p>185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562]&gt;54;&quot;OLD&quot;;IF([.$L562]&gt;=31;&quot;Middle Age&quot;;IF([.$L56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218" table:style-name="ce1">
            <text:p>272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563]&gt;54;&quot;OLD&quot;;IF([.$L563]&gt;=31;&quot;Middle Age&quot;;IF([.$L56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60" table:style-name="ce1">
            <text:p>185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564]&gt;54;&quot;OLD&quot;;IF([.$L564]&gt;=31;&quot;Middle Age&quot;;IF([.$L56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006" table:style-name="ce1">
            <text:p>250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565]&gt;54;&quot;OLD&quot;;IF([.$L565]&gt;=31;&quot;Middle Age&quot;;IF([.$L56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69" table:style-name="ce1">
            <text:p>173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566]&gt;54;&quot;OLD&quot;;IF([.$L566]&gt;=31;&quot;Middle Age&quot;;IF([.$L566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495" table:style-name="ce1">
            <text:p>144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567]&gt;54;&quot;OLD&quot;;IF([.$L567]&gt;=31;&quot;Middle Age&quot;;IF([.$L56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847" table:style-name="ce1">
            <text:p>188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$L568]&gt;54;&quot;OLD&quot;;IF([.$L568]&gt;=31;&quot;Middle Age&quot;;IF([.$L56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754" table:style-name="ce1">
            <text:p>147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569]&gt;54;&quot;OLD&quot;;IF([.$L569]&gt;=31;&quot;Middle Age&quot;;IF([.$L56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78" table:style-name="ce1">
            <text:p>233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570]&gt;54;&quot;OLD&quot;;IF([.$L570]&gt;=31;&quot;Middle Age&quot;;IF([.$L57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452" table:style-name="ce1">
            <text:p>264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571]&gt;54;&quot;OLD&quot;;IF([.$L571]&gt;=31;&quot;Middle Age&quot;;IF([.$L57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70" table:style-name="ce1">
            <text:p>203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572]&gt;54;&quot;OLD&quot;;IF([.$L572]&gt;=31;&quot;Middle Age&quot;;IF([.$L57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28" table:style-name="ce1">
            <text:p>205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573]&gt;54;&quot;OLD&quot;;IF([.$L573]&gt;=31;&quot;Middle Age&quot;;IF([.$L57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549" table:style-name="ce1">
            <text:p>235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574]&gt;54;&quot;OLD&quot;;IF([.$L574]&gt;=31;&quot;Middle Age&quot;;IF([.$L57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51" table:style-name="ce1">
            <text:p>217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575]&gt;54;&quot;OLD&quot;;IF([.$L575]&gt;=31;&quot;Middle Age&quot;;IF([.$L57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266" table:style-name="ce1">
            <text:p>212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576]&gt;54;&quot;OLD&quot;;IF([.$L576]&gt;=31;&quot;Middle Age&quot;;IF([.$L57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88" table:style-name="ce1">
            <text:p>133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577]&gt;54;&quot;OLD&quot;;IF([.$L577]&gt;=31;&quot;Middle Age&quot;;IF([.$L57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752" table:style-name="ce1">
            <text:p>187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578]&gt;54;&quot;OLD&quot;;IF([.$L578]&gt;=31;&quot;Middle Age&quot;;IF([.$L57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917" table:style-name="ce1">
            <text:p>169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579]&gt;54;&quot;OLD&quot;;IF([.$L579]&gt;=31;&quot;Middle Age&quot;;IF([.$L57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313" table:style-name="ce1">
            <text:p>153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580]&gt;54;&quot;OLD&quot;;IF([.$L580]&gt;=31;&quot;Middle Age&quot;;IF([.$L58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29" table:style-name="ce1">
            <text:p>253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581]&gt;54;&quot;OLD&quot;;IF([.$L581]&gt;=31;&quot;Middle Age&quot;;IF([.$L58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80" table:style-name="ce1">
            <text:p>203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582]&gt;54;&quot;OLD&quot;;IF([.$L582]&gt;=31;&quot;Middle Age&quot;;IF([.$L58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089" table:style-name="ce1">
            <text:p>230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583]&gt;54;&quot;OLD&quot;;IF([.$L583]&gt;=31;&quot;Middle Age&quot;;IF([.$L583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49" table:style-name="ce1">
            <text:p>137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584]&gt;54;&quot;OLD&quot;;IF([.$L584]&gt;=31;&quot;Middle Age&quot;;IF([.$L58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43" table:style-name="ce1">
            <text:p>249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585]&gt;54;&quot;OLD&quot;;IF([.$L585]&gt;=31;&quot;Middle Age&quot;;IF([.$L58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67" table:style-name="ce1">
            <text:p>2866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586]&gt;54;&quot;OLD&quot;;IF([.$L586]&gt;=31;&quot;Middle Age&quot;;IF([.$L58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194" table:style-name="ce1">
            <text:p>151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587]&gt;54;&quot;OLD&quot;;IF([.$L587]&gt;=31;&quot;Middle Age&quot;;IF([.$L58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436" table:style-name="ce1">
            <text:p>174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588]&gt;54;&quot;OLD&quot;;IF([.$L588]&gt;=31;&quot;Middle Age&quot;;IF([.$L58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35" table:style-name="ce1">
            <text:p>189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589]&gt;54;&quot;OLD&quot;;IF([.$L589]&gt;=31;&quot;Middle Age&quot;;IF([.$L58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871" table:style-name="ce1">
            <text:p>168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590]&gt;54;&quot;OLD&quot;;IF([.$L590]&gt;=31;&quot;Middle Age&quot;;IF([.$L59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100" table:style-name="ce1">
            <text:p>121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591]&gt;54;&quot;OLD&quot;;IF([.$L591]&gt;=31;&quot;Middle Age&quot;;IF([.$L59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158" table:style-name="ce1">
            <text:p>231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592]&gt;54;&quot;OLD&quot;;IF([.$L592]&gt;=31;&quot;Middle Age&quot;;IF([.$L59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545" table:style-name="ce1">
            <text:p>185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593]&gt;54;&quot;OLD&quot;;IF([.$L593]&gt;=31;&quot;Middle Age&quot;;IF([.$L59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391" table:style-name="ce1">
            <text:p>183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594]&gt;54;&quot;OLD&quot;;IF([.$L594]&gt;=31;&quot;Middle Age&quot;;IF([.$L59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812" table:style-name="ce1">
            <text:p>198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595]&gt;54;&quot;OLD&quot;;IF([.$L595]&gt;=31;&quot;Middle Age&quot;;IF([.$L59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60" table:style-name="ce1">
            <text:p>276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$L596]&gt;54;&quot;OLD&quot;;IF([.$L596]&gt;=31;&quot;Middle Age&quot;;IF([.$L59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058" table:style-name="ce1">
            <text:p>180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78" table:style-name="ce1">
            <text:p>78</text:p>
          </table:table-cell>
          <table:table-cell office:value-type="string" office:string-value="OLD" table:formula="of:=IF([.$L597]&gt;54;&quot;OLD&quot;;IF([.$L597]&gt;=31;&quot;Middle Age&quot;;IF([.$L59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43" table:style-name="ce1">
            <text:p>203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598]&gt;54;&quot;OLD&quot;;IF([.$L598]&gt;=31;&quot;Middle Age&quot;;IF([.$L59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97" table:style-name="ce1">
            <text:p>289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599]&gt;54;&quot;OLD&quot;;IF([.$L599]&gt;=31;&quot;Middle Age&quot;;IF([.$L599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398" table:style-name="ce1">
            <text:p>243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600]&gt;54;&quot;OLD&quot;;IF([.$L600]&gt;=31;&quot;Middle Age&quot;;IF([.$L60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002" table:style-name="ce1">
            <text:p>190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601]&gt;54;&quot;OLD&quot;;IF([.$L601]&gt;=31;&quot;Middle Age&quot;;IF([.$L601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609" table:style-name="ce1">
            <text:p>2860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602]&gt;54;&quot;OLD&quot;;IF([.$L602]&gt;=31;&quot;Middle Age&quot;;IF([.$L60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31" table:style-name="ce1">
            <text:p>292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603]&gt;54;&quot;OLD&quot;;IF([.$L603]&gt;=31;&quot;Middle Age&quot;;IF([.$L60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858" table:style-name="ce1">
            <text:p>188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604]&gt;54;&quot;OLD&quot;;IF([.$L604]&gt;=31;&quot;Middle Age&quot;;IF([.$L60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605]&gt;54;&quot;OLD&quot;;IF([.$L605]&gt;=31;&quot;Middle Age&quot;;IF([.$L60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261" table:style-name="ce1">
            <text:p>252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606]&gt;54;&quot;OLD&quot;;IF([.$L606]&gt;=31;&quot;Middle Age&quot;;IF([.$L606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58" table:style-name="ce1">
            <text:p>174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607]&gt;54;&quot;OLD&quot;;IF([.$L607]&gt;=31;&quot;Middle Age&quot;;IF([.$L60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644" table:style-name="ce1">
            <text:p>116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608]&gt;54;&quot;OLD&quot;;IF([.$L608]&gt;=31;&quot;Middle Age&quot;;IF([.$L60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45" table:style-name="ce1">
            <text:p>161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609]&gt;54;&quot;OLD&quot;;IF([.$L609]&gt;=31;&quot;Middle Age&quot;;IF([.$L60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890" table:style-name="ce1">
            <text:p>168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610]&gt;54;&quot;OLD&quot;;IF([.$L610]&gt;=31;&quot;Middle Age&quot;;IF([.$L61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83" table:style-name="ce1">
            <text:p>259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611]&gt;54;&quot;OLD&quot;;IF([.$L611]&gt;=31;&quot;Middle Age&quot;;IF([.$L61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33" table:style-name="ce1">
            <text:p>146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612]&gt;54;&quot;OLD&quot;;IF([.$L612]&gt;=31;&quot;Middle Age&quot;;IF([.$L61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994" table:style-name="ce1">
            <text:p>229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613]&gt;54;&quot;OLD&quot;;IF([.$L613]&gt;=31;&quot;Middle Age&quot;;IF([.$L61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83" table:style-name="ce1">
            <text:p>229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614]&gt;54;&quot;OLD&quot;;IF([.$L614]&gt;=31;&quot;Middle Age&quot;;IF([.$L61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184" table:style-name="ce1">
            <text:p>251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615]&gt;54;&quot;OLD&quot;;IF([.$L615]&gt;=31;&quot;Middle Age&quot;;IF([.$L61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469" table:style-name="ce1">
            <text:p>144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616]&gt;54;&quot;OLD&quot;;IF([.$L616]&gt;=31;&quot;Middle Age&quot;;IF([.$L61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538" table:style-name="ce1">
            <text:p>115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17]&gt;54;&quot;OLD&quot;;IF([.$L617]&gt;=31;&quot;Middle Age&quot;;IF([.$L61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245" table:style-name="ce1">
            <text:p>162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18]&gt;54;&quot;OLD&quot;;IF([.$L618]&gt;=31;&quot;Middle Age&quot;;IF([.$L61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58" table:style-name="ce1">
            <text:p>178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619]&gt;54;&quot;OLD&quot;;IF([.$L619]&gt;=31;&quot;Middle Age&quot;;IF([.$L61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47" table:style-name="ce1">
            <text:p>253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620]&gt;54;&quot;OLD&quot;;IF([.$L620]&gt;=31;&quot;Middle Age&quot;;IF([.$L62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14" table:style-name="ce1">
            <text:p>158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621]&gt;54;&quot;OLD&quot;;IF([.$L621]&gt;=31;&quot;Middle Age&quot;;IF([.$L621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259" table:style-name="ce1">
            <text:p>112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622]&gt;54;&quot;OLD&quot;;IF([.$L622]&gt;=31;&quot;Middle Age&quot;;IF([.$L62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00" table:style-name="ce1">
            <text:p>112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623]&gt;54;&quot;OLD&quot;;IF([.$L623]&gt;=31;&quot;Middle Age&quot;;IF([.$L62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101" table:style-name="ce1">
            <text:p>251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24]&gt;54;&quot;OLD&quot;;IF([.$L624]&gt;=31;&quot;Middle Age&quot;;IF([.$L62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801" table:style-name="ce1">
            <text:p>218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625]&gt;54;&quot;OLD&quot;;IF([.$L625]&gt;=31;&quot;Middle Age&quot;;IF([.$L62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943" table:style-name="ce1">
            <text:p>259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626]&gt;54;&quot;OLD&quot;;IF([.$L626]&gt;=31;&quot;Middle Age&quot;;IF([.$L626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127" table:style-name="ce1">
            <text:p>221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627]&gt;54;&quot;OLD&quot;;IF([.$L627]&gt;=31;&quot;Middle Age&quot;;IF([.$L62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414" table:style-name="ce1">
            <text:p>204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628]&gt;54;&quot;OLD&quot;;IF([.$L628]&gt;=31;&quot;Middle Age&quot;;IF([.$L62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72" table:style-name="ce1">
            <text:p>236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629]&gt;54;&quot;OLD&quot;;IF([.$L629]&gt;=31;&quot;Middle Age&quot;;IF([.$L62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55" table:style-name="ce1">
            <text:p>292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630]&gt;54;&quot;OLD&quot;;IF([.$L630]&gt;=31;&quot;Middle Age&quot;;IF([.$L63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815" table:style-name="ce1">
            <text:p>2881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631]&gt;54;&quot;OLD&quot;;IF([.$L631]&gt;=31;&quot;Middle Age&quot;;IF([.$L63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53" table:style-name="ce1">
            <text:p>277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632]&gt;54;&quot;OLD&quot;;IF([.$L632]&gt;=31;&quot;Middle Age&quot;;IF([.$L632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643" table:style-name="ce1">
            <text:p>276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633]&gt;54;&quot;OLD&quot;;IF([.$L633]&gt;=31;&quot;Middle Age&quot;;IF([.$L63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54" table:style-name="ce1">
            <text:p>137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634]&gt;54;&quot;OLD&quot;;IF([.$L634]&gt;=31;&quot;Middle Age&quot;;IF([.$L63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88" table:style-name="ce1">
            <text:p>2208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635]&gt;54;&quot;OLD&quot;;IF([.$L635]&gt;=31;&quot;Middle Age&quot;;IF([.$L63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388" table:style-name="ce1">
            <text:p>2738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636]&gt;54;&quot;OLD&quot;;IF([.$L636]&gt;=31;&quot;Middle Age&quot;;IF([.$L63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745" table:style-name="ce1">
            <text:p>247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637]&gt;54;&quot;OLD&quot;;IF([.$L637]&gt;=31;&quot;Middle Age&quot;;IF([.$L63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37" table:style-name="ce1">
            <text:p>292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638]&gt;54;&quot;OLD&quot;;IF([.$L638]&gt;=31;&quot;Middle Age&quot;;IF([.$L63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272" table:style-name="ce1">
            <text:p>152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639]&gt;54;&quot;OLD&quot;;IF([.$L639]&gt;=31;&quot;Middle Age&quot;;IF([.$L63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49" table:style-name="ce1">
            <text:p>189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4" table:style-name="ce1">
            <text:p>74</text:p>
          </table:table-cell>
          <table:table-cell office:value-type="string" office:string-value="OLD" table:formula="of:=IF([.$L640]&gt;54;&quot;OLD&quot;;IF([.$L640]&gt;=31;&quot;Middle Age&quot;;IF([.$L64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07" table:style-name="ce1">
            <text:p>145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641]&gt;54;&quot;OLD&quot;;IF([.$L641]&gt;=31;&quot;Middle Age&quot;;IF([.$L64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86" table:style-name="ce1">
            <text:p>258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642]&gt;54;&quot;OLD&quot;;IF([.$L642]&gt;=31;&quot;Middle Age&quot;;IF([.$L642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441" table:style-name="ce1">
            <text:p>214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643]&gt;54;&quot;OLD&quot;;IF([.$L643]&gt;=31;&quot;Middle Age&quot;;IF([.$L64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41" table:style-name="ce1">
            <text:p>217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644]&gt;54;&quot;OLD&quot;;IF([.$L644]&gt;=31;&quot;Middle Age&quot;;IF([.$L64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72" table:style-name="ce1">
            <text:p>145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645]&gt;54;&quot;OLD&quot;;IF([.$L645]&gt;=31;&quot;Middle Age&quot;;IF([.$L64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68" table:style-name="ce1">
            <text:p>233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646]&gt;54;&quot;OLD&quot;;IF([.$L646]&gt;=31;&quot;Middle Age&quot;;IF([.$L64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217" table:style-name="ce1">
            <text:p>162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647]&gt;54;&quot;OLD&quot;;IF([.$L647]&gt;=31;&quot;Middle Age&quot;;IF([.$L64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247" table:style-name="ce1">
            <text:p>162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48]&gt;54;&quot;OLD&quot;;IF([.$L648]&gt;=31;&quot;Middle Age&quot;;IF([.$L64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10" table:style-name="ce1">
            <text:p>220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649]&gt;54;&quot;OLD&quot;;IF([.$L649]&gt;=31;&quot;Middle Age&quot;;IF([.$L64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72" table:style-name="ce1">
            <text:p>258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650]&gt;54;&quot;OLD&quot;;IF([.$L650]&gt;=31;&quot;Middle Age&quot;;IF([.$L65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164" table:style-name="ce1">
            <text:p>191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651]&gt;54;&quot;OLD&quot;;IF([.$L651]&gt;=31;&quot;Middle Age&quot;;IF([.$L65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435" table:style-name="ce1">
            <text:p>1843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652]&gt;54;&quot;OLD&quot;;IF([.$L652]&gt;=31;&quot;Middle Age&quot;;IF([.$L652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84" table:style-name="ce1">
            <text:p>142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653]&gt;54;&quot;OLD&quot;;IF([.$L653]&gt;=31;&quot;Middle Age&quot;;IF([.$L65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87" table:style-name="ce1">
            <text:p>112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654]&gt;54;&quot;OLD&quot;;IF([.$L654]&gt;=31;&quot;Middle Age&quot;;IF([.$L65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066" table:style-name="ce1">
            <text:p>130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655]&gt;54;&quot;OLD&quot;;IF([.$L655]&gt;=31;&quot;Middle Age&quot;;IF([.$L65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106" table:style-name="ce1">
            <text:p>291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656]&gt;54;&quot;OLD&quot;;IF([.$L656]&gt;=31;&quot;Middle Age&quot;;IF([.$L65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236" table:style-name="ce1">
            <text:p>262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657]&gt;54;&quot;OLD&quot;;IF([.$L657]&gt;=31;&quot;Middle Age&quot;;IF([.$L65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531" table:style-name="ce1">
            <text:p>175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658]&gt;54;&quot;OLD&quot;;IF([.$L658]&gt;=31;&quot;Middle Age&quot;;IF([.$L65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964" table:style-name="ce1">
            <text:p>129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659]&gt;54;&quot;OLD&quot;;IF([.$L659]&gt;=31;&quot;Middle Age&quot;;IF([.$L65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33" table:style-name="ce1">
            <text:p>191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660]&gt;54;&quot;OLD&quot;;IF([.$L660]&gt;=31;&quot;Middle Age&quot;;IF([.$L66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643" table:style-name="ce1">
            <text:p>246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661]&gt;54;&quot;OLD&quot;;IF([.$L661]&gt;=31;&quot;Middle Age&quot;;IF([.$L66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99" table:style-name="ce1">
            <text:p>215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662]&gt;54;&quot;OLD&quot;;IF([.$L662]&gt;=31;&quot;Middle Age&quot;;IF([.$L66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76" table:style-name="ce1">
            <text:p>229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663]&gt;54;&quot;OLD&quot;;IF([.$L663]&gt;=31;&quot;Middle Age&quot;;IF([.$L66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37" table:style-name="ce1">
            <text:p>276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664]&gt;54;&quot;OLD&quot;;IF([.$L664]&gt;=31;&quot;Middle Age&quot;;IF([.$L66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90" table:style-name="ce1">
            <text:p>118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65]&gt;54;&quot;OLD&quot;;IF([.$L665]&gt;=31;&quot;Middle Age&quot;;IF([.$L66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580" table:style-name="ce1">
            <text:p>285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666]&gt;54;&quot;OLD&quot;;IF([.$L666]&gt;=31;&quot;Middle Age&quot;;IF([.$L66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443" table:style-name="ce1">
            <text:p>144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667]&gt;54;&quot;OLD&quot;;IF([.$L667]&gt;=31;&quot;Middle Age&quot;;IF([.$L66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64" table:style-name="ce1">
            <text:p>178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668]&gt;54;&quot;OLD&quot;;IF([.$L668]&gt;=31;&quot;Middle Age&quot;;IF([.$L66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05" table:style-name="ce1">
            <text:p>205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669]&gt;54;&quot;OLD&quot;;IF([.$L669]&gt;=31;&quot;Middle Age&quot;;IF([.$L66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592" table:style-name="ce1">
            <text:p>1459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670]&gt;54;&quot;OLD&quot;;IF([.$L670]&gt;=31;&quot;Middle Age&quot;;IF([.$L67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27" table:style-name="ce1">
            <text:p>222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671]&gt;54;&quot;OLD&quot;;IF([.$L671]&gt;=31;&quot;Middle Age&quot;;IF([.$L67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471" table:style-name="ce1">
            <text:p>214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672]&gt;54;&quot;OLD&quot;;IF([.$L672]&gt;=31;&quot;Middle Age&quot;;IF([.$L67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52" table:style-name="ce1">
            <text:p>222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673]&gt;54;&quot;OLD&quot;;IF([.$L673]&gt;=31;&quot;Middle Age&quot;;IF([.$L67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260" table:style-name="ce1">
            <text:p>2126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674]&gt;54;&quot;OLD&quot;;IF([.$L674]&gt;=31;&quot;Middle Age&quot;;IF([.$L67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17" table:style-name="ce1">
            <text:p>118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675]&gt;54;&quot;OLD&quot;;IF([.$L675]&gt;=31;&quot;Middle Age&quot;;IF([.$L67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23" table:style-name="ce1">
            <text:p>192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676]&gt;54;&quot;OLD&quot;;IF([.$L676]&gt;=31;&quot;Middle Age&quot;;IF([.$L67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17" table:style-name="ce1">
            <text:p>185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677]&gt;54;&quot;OLD&quot;;IF([.$L677]&gt;=31;&quot;Middle Age&quot;;IF([.$L67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17" table:style-name="ce1">
            <text:p>217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78]&gt;54;&quot;OLD&quot;;IF([.$L678]&gt;=31;&quot;Middle Age&quot;;IF([.$L67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60" table:style-name="ce1">
            <text:p>137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79]&gt;54;&quot;OLD&quot;;IF([.$L679]&gt;=31;&quot;Middle Age&quot;;IF([.$L67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145" table:style-name="ce1">
            <text:p>181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680]&gt;54;&quot;OLD&quot;;IF([.$L680]&gt;=31;&quot;Middle Age&quot;;IF([.$L68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70" table:style-name="ce1">
            <text:p>217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681]&gt;54;&quot;OLD&quot;;IF([.$L681]&gt;=31;&quot;Middle Age&quot;;IF([.$L68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165" table:style-name="ce1">
            <text:p>111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682]&gt;54;&quot;OLD&quot;;IF([.$L682]&gt;=31;&quot;Middle Age&quot;;IF([.$L68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377" table:style-name="ce1">
            <text:p>1637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683]&gt;54;&quot;OLD&quot;;IF([.$L683]&gt;=31;&quot;Middle Age&quot;;IF([.$L68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48" table:style-name="ce1">
            <text:p>262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684]&gt;54;&quot;OLD&quot;;IF([.$L684]&gt;=31;&quot;Middle Age&quot;;IF([.$L68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61" table:style-name="ce1">
            <text:p>234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685]&gt;54;&quot;OLD&quot;;IF([.$L685]&gt;=31;&quot;Middle Age&quot;;IF([.$L68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33" table:style-name="ce1">
            <text:p>291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686]&gt;54;&quot;OLD&quot;;IF([.$L686]&gt;=31;&quot;Middle Age&quot;;IF([.$L68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673" table:style-name="ce1">
            <text:p>2767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687]&gt;54;&quot;OLD&quot;;IF([.$L687]&gt;=31;&quot;Middle Age&quot;;IF([.$L68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774" table:style-name="ce1">
            <text:p>127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688]&gt;54;&quot;OLD&quot;;IF([.$L688]&gt;=31;&quot;Middle Age&quot;;IF([.$L68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910" table:style-name="ce1">
            <text:p>189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689]&gt;54;&quot;OLD&quot;;IF([.$L689]&gt;=31;&quot;Middle Age&quot;;IF([.$L68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99" table:style-name="ce1">
            <text:p>116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690]&gt;54;&quot;OLD&quot;;IF([.$L690]&gt;=31;&quot;Middle Age&quot;;IF([.$L69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25" table:style-name="ce1">
            <text:p>167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691]&gt;54;&quot;OLD&quot;;IF([.$L691]&gt;=31;&quot;Middle Age&quot;;IF([.$L691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269" table:style-name="ce1">
            <text:p>282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692]&gt;54;&quot;OLD&quot;;IF([.$L692]&gt;=31;&quot;Middle Age&quot;;IF([.$L69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144" table:style-name="ce1">
            <text:p>2314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693]&gt;54;&quot;OLD&quot;;IF([.$L693]&gt;=31;&quot;Middle Age&quot;;IF([.$L69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76" table:style-name="ce1">
            <text:p>2337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694]&gt;54;&quot;OLD&quot;;IF([.$L694]&gt;=31;&quot;Middle Age&quot;;IF([.$L69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70" table:style-name="ce1">
            <text:p>259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695]&gt;54;&quot;OLD&quot;;IF([.$L695]&gt;=31;&quot;Middle Age&quot;;IF([.$L69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68" table:style-name="ce1">
            <text:p>2806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696]&gt;54;&quot;OLD&quot;;IF([.$L696]&gt;=31;&quot;Middle Age&quot;;IF([.$L69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390" table:style-name="ce1">
            <text:p>183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697]&gt;54;&quot;OLD&quot;;IF([.$L697]&gt;=31;&quot;Middle Age&quot;;IF([.$L69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12" table:style-name="ce1">
            <text:p>291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698]&gt;54;&quot;OLD&quot;;IF([.$L698]&gt;=31;&quot;Middle Age&quot;;IF([.$L69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090" table:style-name="ce1">
            <text:p>140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699]&gt;54;&quot;OLD&quot;;IF([.$L699]&gt;=31;&quot;Middle Age&quot;;IF([.$L69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040" table:style-name="ce1">
            <text:p>270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700]&gt;54;&quot;OLD&quot;;IF([.$L700]&gt;=31;&quot;Middle Age&quot;;IF([.$L70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79" table:style-name="ce1">
            <text:p>234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701]&gt;54;&quot;OLD&quot;;IF([.$L701]&gt;=31;&quot;Middle Age&quot;;IF([.$L70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795" table:style-name="ce1">
            <text:p>167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02]&gt;54;&quot;OLD&quot;;IF([.$L702]&gt;=31;&quot;Middle Age&quot;;IF([.$L70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14" table:style-name="ce1">
            <text:p>220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703]&gt;54;&quot;OLD&quot;;IF([.$L703]&gt;=31;&quot;Middle Age&quot;;IF([.$L703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14" table:style-name="ce1">
            <text:p>133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704]&gt;54;&quot;OLD&quot;;IF([.$L704]&gt;=31;&quot;Middle Age&quot;;IF([.$L70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619" table:style-name="ce1">
            <text:p>116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705]&gt;54;&quot;OLD&quot;;IF([.$L705]&gt;=31;&quot;Middle Age&quot;;IF([.$L70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32" table:style-name="ce1">
            <text:p>291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706]&gt;54;&quot;OLD&quot;;IF([.$L706]&gt;=31;&quot;Middle Age&quot;;IF([.$L70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99" table:style-name="ce1">
            <text:p>111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07]&gt;54;&quot;OLD&quot;;IF([.$L707]&gt;=31;&quot;Middle Age&quot;;IF([.$L70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96" table:style-name="ce1">
            <text:p>202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708]&gt;54;&quot;OLD&quot;;IF([.$L708]&gt;=31;&quot;Middle Age&quot;;IF([.$L70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46" table:style-name="ce1">
            <text:p>1754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709]&gt;54;&quot;OLD&quot;;IF([.$L709]&gt;=31;&quot;Middle Age&quot;;IF([.$L70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69" table:style-name="ce1">
            <text:p>180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710]&gt;54;&quot;OLD&quot;;IF([.$L710]&gt;=31;&quot;Middle Age&quot;;IF([.$L71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712" table:style-name="ce1">
            <text:p>237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11]&gt;54;&quot;OLD&quot;;IF([.$L711]&gt;=31;&quot;Middle Age&quot;;IF([.$L71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358" table:style-name="ce1">
            <text:p>233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712]&gt;54;&quot;OLD&quot;;IF([.$L712]&gt;=31;&quot;Middle Age&quot;;IF([.$L71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18" table:style-name="ce1">
            <text:p>205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$L713]&gt;54;&quot;OLD&quot;;IF([.$L713]&gt;=31;&quot;Middle Age&quot;;IF([.$L71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26" table:style-name="ce1">
            <text:p>280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14]&gt;54;&quot;OLD&quot;;IF([.$L714]&gt;=31;&quot;Middle Age&quot;;IF([.$L71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69" table:style-name="ce1">
            <text:p>116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715]&gt;54;&quot;OLD&quot;;IF([.$L715]&gt;=31;&quot;Middle Age&quot;;IF([.$L71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20" table:style-name="ce1">
            <text:p>1602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716]&gt;54;&quot;OLD&quot;;IF([.$L716]&gt;=31;&quot;Middle Age&quot;;IF([.$L716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717]&gt;54;&quot;OLD&quot;;IF([.$L717]&gt;=31;&quot;Middle Age&quot;;IF([.$L71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198" table:style-name="ce1">
            <text:p>271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718]&gt;54;&quot;OLD&quot;;IF([.$L718]&gt;=31;&quot;Middle Age&quot;;IF([.$L71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61" table:style-name="ce1">
            <text:p>1966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719]&gt;54;&quot;OLD&quot;;IF([.$L719]&gt;=31;&quot;Middle Age&quot;;IF([.$L71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327" table:style-name="ce1">
            <text:p>263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720]&gt;54;&quot;OLD&quot;;IF([.$L720]&gt;=31;&quot;Middle Age&quot;;IF([.$L72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341" table:style-name="ce1">
            <text:p>263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721]&gt;54;&quot;OLD&quot;;IF([.$L721]&gt;=31;&quot;Middle Age&quot;;IF([.$L72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58" table:style-name="ce1">
            <text:p>249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722]&gt;54;&quot;OLD&quot;;IF([.$L722]&gt;=31;&quot;Middle Age&quot;;IF([.$L722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287" table:style-name="ce1">
            <text:p>132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723]&gt;54;&quot;OLD&quot;;IF([.$L723]&gt;=31;&quot;Middle Age&quot;;IF([.$L72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493" table:style-name="ce1">
            <text:p>144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724]&gt;54;&quot;OLD&quot;;IF([.$L724]&gt;=31;&quot;Middle Age&quot;;IF([.$L72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678" table:style-name="ce1">
            <text:p>266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725]&gt;54;&quot;OLD&quot;;IF([.$L725]&gt;=31;&quot;Middle Age&quot;;IF([.$L72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75" table:style-name="ce1">
            <text:p>232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726]&gt;54;&quot;OLD&quot;;IF([.$L726]&gt;=31;&quot;Middle Age&quot;;IF([.$L72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270" table:style-name="ce1">
            <text:p>112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727]&gt;54;&quot;OLD&quot;;IF([.$L727]&gt;=31;&quot;Middle Age&quot;;IF([.$L72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084" table:style-name="ce1">
            <text:p>200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728]&gt;54;&quot;OLD&quot;;IF([.$L728]&gt;=31;&quot;Middle Age&quot;;IF([.$L72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44" table:style-name="ce1">
            <text:p>1614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729]&gt;54;&quot;OLD&quot;;IF([.$L729]&gt;=31;&quot;Middle Age&quot;;IF([.$L72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730]&gt;54;&quot;OLD&quot;;IF([.$L730]&gt;=31;&quot;Middle Age&quot;;IF([.$L73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86" table:style-name="ce1">
            <text:p>118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731]&gt;54;&quot;OLD&quot;;IF([.$L731]&gt;=31;&quot;Middle Age&quot;;IF([.$L73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324" table:style-name="ce1">
            <text:p>2432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732]&gt;54;&quot;OLD&quot;;IF([.$L732]&gt;=31;&quot;Middle Age&quot;;IF([.$L73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220" table:style-name="ce1">
            <text:p>2222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733]&gt;54;&quot;OLD&quot;;IF([.$L733]&gt;=31;&quot;Middle Age&quot;;IF([.$L73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25" table:style-name="ce1">
            <text:p>2662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734]&gt;54;&quot;OLD&quot;;IF([.$L734]&gt;=31;&quot;Middle Age&quot;;IF([.$L73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027" table:style-name="ce1">
            <text:p>230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735]&gt;54;&quot;OLD&quot;;IF([.$L735]&gt;=31;&quot;Middle Age&quot;;IF([.$L73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736]&gt;54;&quot;OLD&quot;;IF([.$L736]&gt;=31;&quot;Middle Age&quot;;IF([.$L73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14" table:style-name="ce1">
            <text:p>145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737]&gt;54;&quot;OLD&quot;;IF([.$L737]&gt;=31;&quot;Middle Age&quot;;IF([.$L737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34" table:style-name="ce1">
            <text:p>196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738]&gt;54;&quot;OLD&quot;;IF([.$L738]&gt;=31;&quot;Middle Age&quot;;IF([.$L73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04" table:style-name="ce1">
            <text:p>185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739]&gt;54;&quot;OLD&quot;;IF([.$L739]&gt;=31;&quot;Middle Age&quot;;IF([.$L73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799" table:style-name="ce1">
            <text:p>287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740]&gt;54;&quot;OLD&quot;;IF([.$L740]&gt;=31;&quot;Middle Age&quot;;IF([.$L74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25" table:style-name="ce1">
            <text:p>112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741]&gt;54;&quot;OLD&quot;;IF([.$L741]&gt;=31;&quot;Middle Age&quot;;IF([.$L74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57" table:style-name="ce1">
            <text:p>176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742]&gt;54;&quot;OLD&quot;;IF([.$L742]&gt;=31;&quot;Middle Age&quot;;IF([.$L742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13" table:style-name="ce1">
            <text:p>149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743]&gt;54;&quot;OLD&quot;;IF([.$L743]&gt;=31;&quot;Middle Age&quot;;IF([.$L74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77" table:style-name="ce1">
            <text:p>1407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744]&gt;54;&quot;OLD&quot;;IF([.$L744]&gt;=31;&quot;Middle Age&quot;;IF([.$L74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296" table:style-name="ce1">
            <text:p>132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745]&gt;54;&quot;OLD&quot;;IF([.$L745]&gt;=31;&quot;Middle Age&quot;;IF([.$L74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35" table:style-name="ce1">
            <text:p>205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746]&gt;54;&quot;OLD&quot;;IF([.$L746]&gt;=31;&quot;Middle Age&quot;;IF([.$L74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452" table:style-name="ce1">
            <text:p>124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747]&gt;54;&quot;OLD&quot;;IF([.$L747]&gt;=31;&quot;Middle Age&quot;;IF([.$L74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43" table:style-name="ce1">
            <text:p>280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748]&gt;54;&quot;OLD&quot;;IF([.$L748]&gt;=31;&quot;Middle Age&quot;;IF([.$L74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957" table:style-name="ce1">
            <text:p>129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749]&gt;54;&quot;OLD&quot;;IF([.$L749]&gt;=31;&quot;Middle Age&quot;;IF([.$L74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412" table:style-name="ce1">
            <text:p>154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750]&gt;54;&quot;OLD&quot;;IF([.$L750]&gt;=31;&quot;Middle Age&quot;;IF([.$L75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14" table:style-name="ce1">
            <text:p>205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51]&gt;54;&quot;OLD&quot;;IF([.$L751]&gt;=31;&quot;Middle Age&quot;;IF([.$L75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758" table:style-name="ce1">
            <text:p>207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752]&gt;54;&quot;OLD&quot;;IF([.$L752]&gt;=31;&quot;Middle Age&quot;;IF([.$L75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01" table:style-name="ce1">
            <text:p>118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753]&gt;54;&quot;OLD&quot;;IF([.$L753]&gt;=31;&quot;Middle Age&quot;;IF([.$L75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11" table:style-name="ce1">
            <text:p>2221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754]&gt;54;&quot;OLD&quot;;IF([.$L754]&gt;=31;&quot;Middle Age&quot;;IF([.$L75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87" table:style-name="ce1">
            <text:p>280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755]&gt;54;&quot;OLD&quot;;IF([.$L755]&gt;=31;&quot;Middle Age&quot;;IF([.$L75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68" table:style-name="ce1">
            <text:p>236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56]&gt;54;&quot;OLD&quot;;IF([.$L756]&gt;=31;&quot;Middle Age&quot;;IF([.$L756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441" table:style-name="ce1">
            <text:p>274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757]&gt;54;&quot;OLD&quot;;IF([.$L757]&gt;=31;&quot;Middle Age&quot;;IF([.$L75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261" table:style-name="ce1">
            <text:p>272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758]&gt;54;&quot;OLD&quot;;IF([.$L758]&gt;=31;&quot;Middle Age&quot;;IF([.$L75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49" table:style-name="ce1">
            <text:p>186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759]&gt;54;&quot;OLD&quot;;IF([.$L759]&gt;=31;&quot;Middle Age&quot;;IF([.$L75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714" table:style-name="ce1">
            <text:p>217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760]&gt;54;&quot;OLD&quot;;IF([.$L760]&gt;=31;&quot;Middle Age&quot;;IF([.$L76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17" table:style-name="ce1">
            <text:p>232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761]&gt;54;&quot;OLD&quot;;IF([.$L761]&gt;=31;&quot;Middle Age&quot;;IF([.$L76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797" table:style-name="ce1">
            <text:p>237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762]&gt;54;&quot;OLD&quot;;IF([.$L762]&gt;=31;&quot;Middle Age&quot;;IF([.$L76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216" table:style-name="ce1">
            <text:p>1321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63]&gt;54;&quot;OLD&quot;;IF([.$L763]&gt;=31;&quot;Middle Age&quot;;IF([.$L76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57" table:style-name="ce1">
            <text:p>206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764]&gt;54;&quot;OLD&quot;;IF([.$L764]&gt;=31;&quot;Middle Age&quot;;IF([.$L76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882" table:style-name="ce1">
            <text:p>128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765]&gt;54;&quot;OLD&quot;;IF([.$L765]&gt;=31;&quot;Middle Age&quot;;IF([.$L76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08" table:style-name="ce1">
            <text:p>259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766]&gt;54;&quot;OLD&quot;;IF([.$L766]&gt;=31;&quot;Middle Age&quot;;IF([.$L766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53" table:style-name="ce1">
            <text:p>167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767]&gt;54;&quot;OLD&quot;;IF([.$L767]&gt;=31;&quot;Middle Age&quot;;IF([.$L76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08" table:style-name="ce1">
            <text:p>146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768]&gt;54;&quot;OLD&quot;;IF([.$L768]&gt;=31;&quot;Middle Age&quot;;IF([.$L76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79" table:style-name="ce1">
            <text:p>2497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769]&gt;54;&quot;OLD&quot;;IF([.$L769]&gt;=31;&quot;Middle Age&quot;;IF([.$L769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13" table:style-name="ce1">
            <text:p>133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770]&gt;54;&quot;OLD&quot;;IF([.$L770]&gt;=31;&quot;Middle Age&quot;;IF([.$L77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52" table:style-name="ce1">
            <text:p>189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771]&gt;54;&quot;OLD&quot;;IF([.$L771]&gt;=31;&quot;Middle Age&quot;;IF([.$L77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99" table:style-name="ce1">
            <text:p>176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772]&gt;54;&quot;OLD&quot;;IF([.$L772]&gt;=31;&quot;Middle Age&quot;;IF([.$L77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57" table:style-name="ce1">
            <text:p>146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773]&gt;54;&quot;OLD&quot;;IF([.$L773]&gt;=31;&quot;Middle Age&quot;;IF([.$L77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540" table:style-name="ce1">
            <text:p>115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774]&gt;54;&quot;OLD&quot;;IF([.$L774]&gt;=31;&quot;Middle Age&quot;;IF([.$L77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783" table:style-name="ce1">
            <text:p>117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775]&gt;54;&quot;OLD&quot;;IF([.$L775]&gt;=31;&quot;Middle Age&quot;;IF([.$L77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02" table:style-name="ce1">
            <text:p>146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776]&gt;54;&quot;OLD&quot;;IF([.$L776]&gt;=31;&quot;Middle Age&quot;;IF([.$L77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030" table:style-name="ce1">
            <text:p>290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777]&gt;54;&quot;OLD&quot;;IF([.$L777]&gt;=31;&quot;Middle Age&quot;;IF([.$L77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490" table:style-name="ce1">
            <text:p>264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78]&gt;54;&quot;OLD&quot;;IF([.$L778]&gt;=31;&quot;Middle Age&quot;;IF([.$L77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151" table:style-name="ce1">
            <text:p>131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779]&gt;54;&quot;OLD&quot;;IF([.$L779]&gt;=31;&quot;Middle Age&quot;;IF([.$L77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60" table:style-name="ce1">
            <text:p>172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780]&gt;54;&quot;OLD&quot;;IF([.$L780]&gt;=31;&quot;Middle Age&quot;;IF([.$L78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372" table:style-name="ce1">
            <text:p>153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781]&gt;54;&quot;OLD&quot;;IF([.$L781]&gt;=31;&quot;Middle Age&quot;;IF([.$L78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05" table:style-name="ce1">
            <text:p>181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782]&gt;54;&quot;OLD&quot;;IF([.$L782]&gt;=31;&quot;Middle Age&quot;;IF([.$L78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60" table:style-name="ce1">
            <text:p>196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783]&gt;54;&quot;OLD&quot;;IF([.$L783]&gt;=31;&quot;Middle Age&quot;;IF([.$L78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12" table:style-name="ce1">
            <text:p>161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784]&gt;54;&quot;OLD&quot;;IF([.$L784]&gt;=31;&quot;Middle Age&quot;;IF([.$L78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698" table:style-name="ce1">
            <text:p>206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785]&gt;54;&quot;OLD&quot;;IF([.$L785]&gt;=31;&quot;Middle Age&quot;;IF([.$L78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076" table:style-name="ce1">
            <text:p>200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786]&gt;54;&quot;OLD&quot;;IF([.$L786]&gt;=31;&quot;Middle Age&quot;;IF([.$L78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496" table:style-name="ce1">
            <text:p>244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787]&gt;54;&quot;OLD&quot;;IF([.$L787]&gt;=31;&quot;Middle Age&quot;;IF([.$L787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468" table:style-name="ce1">
            <text:p>154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788]&gt;54;&quot;OLD&quot;;IF([.$L788]&gt;=31;&quot;Middle Age&quot;;IF([.$L78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31" table:style-name="ce1">
            <text:p>280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789]&gt;54;&quot;OLD&quot;;IF([.$L789]&gt;=31;&quot;Middle Age&quot;;IF([.$L789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270" table:style-name="ce1">
            <text:p>262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790]&gt;54;&quot;OLD&quot;;IF([.$L790]&gt;=31;&quot;Middle Age&quot;;IF([.$L79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21" table:style-name="ce1">
            <text:p>2222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791]&gt;54;&quot;OLD&quot;;IF([.$L791]&gt;=31;&quot;Middle Age&quot;;IF([.$L79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228" table:style-name="ce1">
            <text:p>282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792]&gt;54;&quot;OLD&quot;;IF([.$L792]&gt;=31;&quot;Middle Age&quot;;IF([.$L79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363" table:style-name="ce1">
            <text:p>183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793]&gt;54;&quot;OLD&quot;;IF([.$L793]&gt;=31;&quot;Middle Age&quot;;IF([.$L793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256" table:style-name="ce1">
            <text:p>2325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794]&gt;54;&quot;OLD&quot;;IF([.$L794]&gt;=31;&quot;Middle Age&quot;;IF([.$L79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68" table:style-name="ce1">
            <text:p>127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795]&gt;54;&quot;OLD&quot;;IF([.$L795]&gt;=31;&quot;Middle Age&quot;;IF([.$L79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361" table:style-name="ce1">
            <text:p>203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796]&gt;54;&quot;OLD&quot;;IF([.$L796]&gt;=31;&quot;Middle Age&quot;;IF([.$L79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306" table:style-name="ce1">
            <text:p>213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797]&gt;54;&quot;OLD&quot;;IF([.$L797]&gt;=31;&quot;Middle Age&quot;;IF([.$L79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82" table:style-name="ce1">
            <text:p>133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798]&gt;54;&quot;OLD&quot;;IF([.$L798]&gt;=31;&quot;Middle Age&quot;;IF([.$L79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799]&gt;54;&quot;OLD&quot;;IF([.$L799]&gt;=31;&quot;Middle Age&quot;;IF([.$L799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71" table:style-name="ce1">
            <text:p>229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5" table:style-name="ce1">
            <text:p>25</text:p>
          </table:table-cell>
          <table:table-cell office:value-type="string" office:string-value="Adollescent" table:formula="of:=IF([.$L800]&gt;54;&quot;OLD&quot;;IF([.$L800]&gt;=31;&quot;Middle Age&quot;;IF([.$L800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287" table:style-name="ce1">
            <text:p>152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801]&gt;54;&quot;OLD&quot;;IF([.$L801]&gt;=31;&quot;Middle Age&quot;;IF([.$L80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32" table:style-name="ce1">
            <text:p>155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802]&gt;54;&quot;OLD&quot;;IF([.$L802]&gt;=31;&quot;Middle Age&quot;;IF([.$L80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55" table:style-name="ce1">
            <text:p>112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$L803]&gt;54;&quot;OLD&quot;;IF([.$L803]&gt;=31;&quot;Middle Age&quot;;IF([.$L80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90" table:style-name="ce1">
            <text:p>280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804]&gt;54;&quot;OLD&quot;;IF([.$L804]&gt;=31;&quot;Middle Age&quot;;IF([.$L804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55" table:style-name="ce1">
            <text:p>152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805]&gt;54;&quot;OLD&quot;;IF([.$L805]&gt;=31;&quot;Middle Age&quot;;IF([.$L805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154" table:style-name="ce1">
            <text:p>13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806]&gt;54;&quot;OLD&quot;;IF([.$L806]&gt;=31;&quot;Middle Age&quot;;IF([.$L806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778" table:style-name="ce1">
            <text:p>267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807]&gt;54;&quot;OLD&quot;;IF([.$L807]&gt;=31;&quot;Middle Age&quot;;IF([.$L80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48" table:style-name="ce1">
            <text:p>232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3">
            <text:p><text:s/>$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808]&gt;54;&quot;OLD&quot;;IF([.$L808]&gt;=31;&quot;Middle Age&quot;;IF([.$L80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417" table:style-name="ce1">
            <text:p>214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09]&gt;54;&quot;OLD&quot;;IF([.$L809]&gt;=31;&quot;Middle Age&quot;;IF([.$L80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668" table:style-name="ce1">
            <text:p>1766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810]&gt;54;&quot;OLD&quot;;IF([.$L810]&gt;=31;&quot;Middle Age&quot;;IF([.$L81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994" table:style-name="ce1">
            <text:p>279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$L811]&gt;54;&quot;OLD&quot;;IF([.$L811]&gt;=31;&quot;Middle Age&quot;;IF([.$L81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76" table:style-name="ce1">
            <text:p>203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812]&gt;54;&quot;OLD&quot;;IF([.$L812]&gt;=31;&quot;Middle Age&quot;;IF([.$L81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54" table:style-name="ce1">
            <text:p>259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813]&gt;54;&quot;OLD&quot;;IF([.$L813]&gt;=31;&quot;Middle Age&quot;;IF([.$L81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749" table:style-name="ce1">
            <text:p>157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814]&gt;54;&quot;OLD&quot;;IF([.$L814]&gt;=31;&quot;Middle Age&quot;;IF([.$L81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815]&gt;54;&quot;OLD&quot;;IF([.$L815]&gt;=31;&quot;Middle Age&quot;;IF([.$L81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51" table:style-name="ce1">
            <text:p>133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816]&gt;54;&quot;OLD&quot;;IF([.$L816]&gt;=31;&quot;Middle Age&quot;;IF([.$L816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33" table:style-name="ce1">
            <text:p>233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817]&gt;54;&quot;OLD&quot;;IF([.$L817]&gt;=31;&quot;Middle Age&quot;;IF([.$L817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660" table:style-name="ce1">
            <text:p>216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818]&gt;54;&quot;OLD&quot;;IF([.$L818]&gt;=31;&quot;Middle Age&quot;;IF([.$L81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012" table:style-name="ce1">
            <text:p>17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819]&gt;54;&quot;OLD&quot;;IF([.$L819]&gt;=31;&quot;Middle Age&quot;;IF([.$L81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514" table:style-name="ce1">
            <text:p>245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820]&gt;54;&quot;OLD&quot;;IF([.$L820]&gt;=31;&quot;Middle Age&quot;;IF([.$L82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505" table:style-name="ce1">
            <text:p>275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821]&gt;54;&quot;OLD&quot;;IF([.$L821]&gt;=31;&quot;Middle Age&quot;;IF([.$L821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43" table:style-name="ce1">
            <text:p>292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822]&gt;54;&quot;OLD&quot;;IF([.$L822]&gt;=31;&quot;Middle Age&quot;;IF([.$L82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582" table:style-name="ce1">
            <text:p>265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823]&gt;54;&quot;OLD&quot;;IF([.$L823]&gt;=31;&quot;Middle Age&quot;;IF([.$L82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71" table:style-name="ce1">
            <text:p>142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24]&gt;54;&quot;OLD&quot;;IF([.$L824]&gt;=31;&quot;Middle Age&quot;;IF([.$L82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041" table:style-name="ce1">
            <text:p>230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825]&gt;54;&quot;OLD&quot;;IF([.$L825]&gt;=31;&quot;Middle Age&quot;;IF([.$L82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048" table:style-name="ce1">
            <text:p>2904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826]&gt;54;&quot;OLD&quot;;IF([.$L826]&gt;=31;&quot;Middle Age&quot;;IF([.$L82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827]&gt;54;&quot;OLD&quot;;IF([.$L827]&gt;=31;&quot;Middle Age&quot;;IF([.$L82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01" table:style-name="ce1">
            <text:p>155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828]&gt;54;&quot;OLD&quot;;IF([.$L828]&gt;=31;&quot;Middle Age&quot;;IF([.$L82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11" table:style-name="ce1">
            <text:p>1391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829]&gt;54;&quot;OLD&quot;;IF([.$L829]&gt;=31;&quot;Middle Age&quot;;IF([.$L82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421" table:style-name="ce1">
            <text:p>204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830]&gt;54;&quot;OLD&quot;;IF([.$L830]&gt;=31;&quot;Middle Age&quot;;IF([.$L83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09" table:style-name="ce1">
            <text:p>1600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70000" table:style-name="ce3">
            <text:p><text:s/>$1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831]&gt;54;&quot;OLD&quot;;IF([.$L831]&gt;=31;&quot;Middle Age&quot;;IF([.$L83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411" table:style-name="ce1">
            <text:p>1841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832]&gt;54;&quot;OLD&quot;;IF([.$L832]&gt;=31;&quot;Middle Age&quot;;IF([.$L83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63" table:style-name="ce1">
            <text:p>191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833]&gt;54;&quot;OLD&quot;;IF([.$L833]&gt;=31;&quot;Middle Age&quot;;IF([.$L83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572" table:style-name="ce1">
            <text:p>185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834]&gt;54;&quot;OLD&quot;;IF([.$L834]&gt;=31;&quot;Middle Age&quot;;IF([.$L83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540" table:style-name="ce1">
            <text:p>275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835]&gt;54;&quot;OLD&quot;;IF([.$L835]&gt;=31;&quot;Middle Age&quot;;IF([.$L83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889" table:style-name="ce1">
            <text:p>198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836]&gt;54;&quot;OLD&quot;;IF([.$L836]&gt;=31;&quot;Middle Age&quot;;IF([.$L83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922" table:style-name="ce1">
            <text:p>1292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837]&gt;54;&quot;OLD&quot;;IF([.$L837]&gt;=31;&quot;Middle Age&quot;;IF([.$L83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891" table:style-name="ce1">
            <text:p>188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838]&gt;54;&quot;OLD&quot;;IF([.$L838]&gt;=31;&quot;Middle Age&quot;;IF([.$L83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73" table:style-name="ce1">
            <text:p>167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839]&gt;54;&quot;OLD&quot;;IF([.$L839]&gt;=31;&quot;Middle Age&quot;;IF([.$L83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43" table:style-name="ce1">
            <text:p>191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840]&gt;54;&quot;OLD&quot;;IF([.$L840]&gt;=31;&quot;Middle Age&quot;;IF([.$L84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882" table:style-name="ce1">
            <text:p>238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841]&gt;54;&quot;OLD&quot;;IF([.$L841]&gt;=31;&quot;Middle Age&quot;;IF([.$L84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33" table:style-name="ce1">
            <text:p>112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842]&gt;54;&quot;OLD&quot;;IF([.$L842]&gt;=31;&quot;Middle Age&quot;;IF([.$L84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056" table:style-name="ce1">
            <text:p>1205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843]&gt;54;&quot;OLD&quot;;IF([.$L843]&gt;=31;&quot;Middle Age&quot;;IF([.$L84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555" table:style-name="ce1">
            <text:p>155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844]&gt;54;&quot;OLD&quot;;IF([.$L844]&gt;=31;&quot;Middle Age&quot;;IF([.$L84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423" table:style-name="ce1">
            <text:p>1842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845]&gt;54;&quot;OLD&quot;;IF([.$L845]&gt;=31;&quot;Middle Age&quot;;IF([.$L84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743" table:style-name="ce1">
            <text:p>227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846]&gt;54;&quot;OLD&quot;;IF([.$L846]&gt;=31;&quot;Middle Age&quot;;IF([.$L84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43" table:style-name="ce1">
            <text:p>253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847]&gt;54;&quot;OLD&quot;;IF([.$L847]&gt;=31;&quot;Middle Age&quot;;IF([.$L84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90" table:style-name="ce1">
            <text:p>133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848]&gt;54;&quot;OLD&quot;;IF([.$L848]&gt;=31;&quot;Middle Age&quot;;IF([.$L84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82" table:style-name="ce1">
            <text:p>174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849]&gt;54;&quot;OLD&quot;;IF([.$L849]&gt;=31;&quot;Middle Age&quot;;IF([.$L84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176" table:style-name="ce1">
            <text:p>131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850]&gt;54;&quot;OLD&quot;;IF([.$L850]&gt;=31;&quot;Middle Age&quot;;IF([.$L85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04" table:style-name="ce1">
            <text:p>205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851]&gt;54;&quot;OLD&quot;;IF([.$L851]&gt;=31;&quot;Middle Age&quot;;IF([.$L85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05" table:style-name="ce1">
            <text:p>122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$L852]&gt;54;&quot;OLD&quot;;IF([.$L852]&gt;=31;&quot;Middle Age&quot;;IF([.$L852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51" table:style-name="ce1">
            <text:p>167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53]&gt;54;&quot;OLD&quot;;IF([.$L853]&gt;=31;&quot;Middle Age&quot;;IF([.$L85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613" table:style-name="ce1">
            <text:p>216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854]&gt;54;&quot;OLD&quot;;IF([.$L854]&gt;=31;&quot;Middle Age&quot;;IF([.$L85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801" table:style-name="ce1">
            <text:p>2480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855]&gt;54;&quot;OLD&quot;;IF([.$L855]&gt;=31;&quot;Middle Age&quot;;IF([.$L85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19" table:style-name="ce1">
            <text:p>175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56]&gt;54;&quot;OLD&quot;;IF([.$L856]&gt;=31;&quot;Middle Age&quot;;IF([.$L85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347" table:style-name="ce1">
            <text:p>183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857]&gt;54;&quot;OLD&quot;;IF([.$L857]&gt;=31;&quot;Middle Age&quot;;IF([.$L85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052" table:style-name="ce1">
            <text:p>290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858]&gt;54;&quot;OLD&quot;;IF([.$L858]&gt;=31;&quot;Middle Age&quot;;IF([.$L85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45" table:style-name="ce1">
            <text:p>117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859]&gt;54;&quot;OLD&quot;;IF([.$L859]&gt;=31;&quot;Middle Age&quot;;IF([.$L85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147" table:style-name="ce1">
            <text:p>191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860]&gt;54;&quot;OLD&quot;;IF([.$L860]&gt;=31;&quot;Middle Age&quot;;IF([.$L86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17" table:style-name="ce1">
            <text:p>192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861]&gt;54;&quot;OLD&quot;;IF([.$L861]&gt;=31;&quot;Middle Age&quot;;IF([.$L86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39" table:style-name="ce1">
            <text:p>158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62]&gt;54;&quot;OLD&quot;;IF([.$L862]&gt;=31;&quot;Middle Age&quot;;IF([.$L86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14" table:style-name="ce1">
            <text:p>137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863]&gt;54;&quot;OLD&quot;;IF([.$L863]&gt;=31;&quot;Middle Age&quot;;IF([.$L86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330" table:style-name="ce1">
            <text:p>223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64]&gt;54;&quot;OLD&quot;;IF([.$L864]&gt;=31;&quot;Middle Age&quot;;IF([.$L86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783" table:style-name="ce1">
            <text:p>187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865]&gt;54;&quot;OLD&quot;;IF([.$L865]&gt;=31;&quot;Middle Age&quot;;IF([.$L86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041" table:style-name="ce1">
            <text:p>250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866]&gt;54;&quot;OLD&quot;;IF([.$L866]&gt;=31;&quot;Middle Age&quot;;IF([.$L86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46" table:style-name="ce1">
            <text:p>2204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867]&gt;54;&quot;OLD&quot;;IF([.$L867]&gt;=31;&quot;Middle Age&quot;;IF([.$L86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52" table:style-name="ce1">
            <text:p>280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868]&gt;54;&quot;OLD&quot;;IF([.$L868]&gt;=31;&quot;Middle Age&quot;;IF([.$L86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693" table:style-name="ce1">
            <text:p>266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869]&gt;54;&quot;OLD&quot;;IF([.$L869]&gt;=31;&quot;Middle Age&quot;;IF([.$L86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55" table:style-name="ce1">
            <text:p>249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870]&gt;54;&quot;OLD&quot;;IF([.$L870]&gt;=31;&quot;Middle Age&quot;;IF([.$L87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065" table:style-name="ce1">
            <text:p>260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871]&gt;54;&quot;OLD&quot;;IF([.$L871]&gt;=31;&quot;Middle Age&quot;;IF([.$L87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942" table:style-name="ce1">
            <text:p>1394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872]&gt;54;&quot;OLD&quot;;IF([.$L872]&gt;=31;&quot;Middle Age&quot;;IF([.$L87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219" table:style-name="ce1">
            <text:p>112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873]&gt;54;&quot;OLD&quot;;IF([.$L873]&gt;=31;&quot;Middle Age&quot;;IF([.$L87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18" table:style-name="ce1">
            <text:p>221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874]&gt;54;&quot;OLD&quot;;IF([.$L874]&gt;=31;&quot;Middle Age&quot;;IF([.$L87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197" table:style-name="ce1">
            <text:p>231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875]&gt;54;&quot;OLD&quot;;IF([.$L875]&gt;=31;&quot;Middle Age&quot;;IF([.$L87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883" table:style-name="ce1">
            <text:p>148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876]&gt;54;&quot;OLD&quot;;IF([.$L876]&gt;=31;&quot;Middle Age&quot;;IF([.$L87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279" table:style-name="ce1">
            <text:p>272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877]&gt;54;&quot;OLD&quot;;IF([.$L877]&gt;=31;&quot;Middle Age&quot;;IF([.$L87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322" table:style-name="ce1">
            <text:p>1832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878]&gt;54;&quot;OLD&quot;;IF([.$L878]&gt;=31;&quot;Middle Age&quot;;IF([.$L878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79" table:style-name="ce1">
            <text:p>1587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879]&gt;54;&quot;OLD&quot;;IF([.$L879]&gt;=31;&quot;Middle Age&quot;;IF([.$L87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278" table:style-name="ce1">
            <text:p>282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1" table:style-name="ce1">
            <text:p>71</text:p>
          </table:table-cell>
          <table:table-cell office:value-type="string" office:string-value="OLD" table:formula="of:=IF([.$L880]&gt;54;&quot;OLD&quot;;IF([.$L880]&gt;=31;&quot;Middle Age&quot;;IF([.$L88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416" table:style-name="ce1">
            <text:p>2441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881]&gt;54;&quot;OLD&quot;;IF([.$L881]&gt;=31;&quot;Middle Age&quot;;IF([.$L88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66" table:style-name="ce1">
            <text:p>280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$L882]&gt;54;&quot;OLD&quot;;IF([.$L882]&gt;=31;&quot;Middle Age&quot;;IF([.$L88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75" table:style-name="ce1">
            <text:p>112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72" table:style-name="ce1">
            <text:p>72</text:p>
          </table:table-cell>
          <table:table-cell office:value-type="string" office:string-value="OLD" table:formula="of:=IF([.$L883]&gt;54;&quot;OLD&quot;;IF([.$L883]&gt;=31;&quot;Middle Age&quot;;IF([.$L88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72" table:style-name="ce1">
            <text:p>148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84]&gt;54;&quot;OLD&quot;;IF([.$L884]&gt;=31;&quot;Middle Age&quot;;IF([.$L88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51" table:style-name="ce1">
            <text:p>161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885]&gt;54;&quot;OLD&quot;;IF([.$L885]&gt;=31;&quot;Middle Age&quot;;IF([.$L88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731" table:style-name="ce1">
            <text:p>197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8" table:style-name="ce1">
            <text:p>68</text:p>
          </table:table-cell>
          <table:table-cell office:value-type="string" office:string-value="OLD" table:formula="of:=IF([.$L886]&gt;54;&quot;OLD&quot;;IF([.$L886]&gt;=31;&quot;Middle Age&quot;;IF([.$L88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801" table:style-name="ce1">
            <text:p>238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3">
            <text:p><text:s/>$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887]&gt;54;&quot;OLD&quot;;IF([.$L887]&gt;=31;&quot;Middle Age&quot;;IF([.$L88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07" table:style-name="ce1">
            <text:p>118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888]&gt;54;&quot;OLD&quot;;IF([.$L888]&gt;=31;&quot;Middle Age&quot;;IF([.$L888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22" table:style-name="ce1">
            <text:p>116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889]&gt;54;&quot;OLD&quot;;IF([.$L889]&gt;=31;&quot;Middle Age&quot;;IF([.$L88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597" table:style-name="ce1">
            <text:p>265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890]&gt;54;&quot;OLD&quot;;IF([.$L890]&gt;=31;&quot;Middle Age&quot;;IF([.$L89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074" table:style-name="ce1">
            <text:p>270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891]&gt;54;&quot;OLD&quot;;IF([.$L891]&gt;=31;&quot;Middle Age&quot;;IF([.$L89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28" table:style-name="ce1">
            <text:p>192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892]&gt;54;&quot;OLD&quot;;IF([.$L892]&gt;=31;&quot;Middle Age&quot;;IF([.$L89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415" table:style-name="ce1">
            <text:p>1341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$L893]&gt;54;&quot;OLD&quot;;IF([.$L893]&gt;=31;&quot;Middle Age&quot;;IF([.$L893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894]&gt;54;&quot;OLD&quot;;IF([.$L894]&gt;=31;&quot;Middle Age&quot;;IF([.$L89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69" table:style-name="ce1">
            <text:p>145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895]&gt;54;&quot;OLD&quot;;IF([.$L895]&gt;=31;&quot;Middle Age&quot;;IF([.$L89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873" table:style-name="ce1">
            <text:p>138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896]&gt;54;&quot;OLD&quot;;IF([.$L896]&gt;=31;&quot;Middle Age&quot;;IF([.$L89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401" table:style-name="ce1">
            <text:p>204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897]&gt;54;&quot;OLD&quot;;IF([.$L897]&gt;=31;&quot;Middle Age&quot;;IF([.$L897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83" table:style-name="ce1">
            <text:p>215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898]&gt;54;&quot;OLD&quot;;IF([.$L898]&gt;=31;&quot;Middle Age&quot;;IF([.$L89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029" table:style-name="ce1">
            <text:p>120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lescent" table:formula="of:=IF([.$L899]&gt;54;&quot;OLD&quot;;IF([.$L899]&gt;=31;&quot;Middle Age&quot;;IF([.$L89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066" table:style-name="ce1">
            <text:p>180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900]&gt;54;&quot;OLD&quot;;IF([.$L900]&gt;=31;&quot;Middle Age&quot;;IF([.$L900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192" table:style-name="ce1">
            <text:p>2819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901]&gt;54;&quot;OLD&quot;;IF([.$L901]&gt;=31;&quot;Middle Age&quot;;IF([.$L90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22" table:style-name="ce1">
            <text:p>161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902]&gt;54;&quot;OLD&quot;;IF([.$L902]&gt;=31;&quot;Middle Age&quot;;IF([.$L90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07" table:style-name="ce1">
            <text:p>186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903]&gt;54;&quot;OLD&quot;;IF([.$L903]&gt;=31;&quot;Middle Age&quot;;IF([.$L90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858" table:style-name="ce1">
            <text:p>288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904]&gt;54;&quot;OLD&quot;;IF([.$L904]&gt;=31;&quot;Middle Age&quot;;IF([.$L90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432" table:style-name="ce1">
            <text:p>144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$L905]&gt;54;&quot;OLD&quot;;IF([.$L905]&gt;=31;&quot;Middle Age&quot;;IF([.$L905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305" table:style-name="ce1">
            <text:p>263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906]&gt;54;&quot;OLD&quot;;IF([.$L906]&gt;=31;&quot;Middle Age&quot;;IF([.$L90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050" table:style-name="ce1">
            <text:p>2205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907]&gt;54;&quot;OLD&quot;;IF([.$L907]&gt;=31;&quot;Middle Age&quot;;IF([.$L90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94" table:style-name="ce1">
            <text:p>253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908]&gt;54;&quot;OLD&quot;;IF([.$L908]&gt;=31;&quot;Middle Age&quot;;IF([.$L90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747" table:style-name="ce1">
            <text:p>197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909]&gt;54;&quot;OLD&quot;;IF([.$L909]&gt;=31;&quot;Middle Age&quot;;IF([.$L90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195" table:style-name="ce1">
            <text:p>231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910]&gt;54;&quot;OLD&quot;;IF([.$L910]&gt;=31;&quot;Middle Age&quot;;IF([.$L91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695" table:style-name="ce1">
            <text:p>216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911]&gt;54;&quot;OLD&quot;;IF([.$L911]&gt;=31;&quot;Middle Age&quot;;IF([.$L91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34" table:style-name="ce1">
            <text:p>139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912]&gt;54;&quot;OLD&quot;;IF([.$L912]&gt;=31;&quot;Middle Age&quot;;IF([.$L91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37" table:style-name="ce1">
            <text:p>133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913]&gt;54;&quot;OLD&quot;;IF([.$L913]&gt;=31;&quot;Middle Age&quot;;IF([.$L91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90" table:style-name="ce1">
            <text:p>271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$L914]&gt;54;&quot;OLD&quot;;IF([.$L914]&gt;=31;&quot;Middle Age&quot;;IF([.$L91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57" table:style-name="ce1">
            <text:p>286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915]&gt;54;&quot;OLD&quot;;IF([.$L915]&gt;=31;&quot;Middle Age&quot;;IF([.$L91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713" table:style-name="ce1">
            <text:p>217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916]&gt;54;&quot;OLD&quot;;IF([.$L916]&gt;=31;&quot;Middle Age&quot;;IF([.$L91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52" table:style-name="ce1">
            <text:p>217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$L917]&gt;54;&quot;OLD&quot;;IF([.$L917]&gt;=31;&quot;Middle Age&quot;;IF([.$L917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273" table:style-name="ce1">
            <text:p>2727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918]&gt;54;&quot;OLD&quot;;IF([.$L918]&gt;=31;&quot;Middle Age&quot;;IF([.$L91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719" table:style-name="ce1">
            <text:p>227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919]&gt;54;&quot;OLD&quot;;IF([.$L919]&gt;=31;&quot;Middle Age&quot;;IF([.$L91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042" table:style-name="ce1">
            <text:p>2204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920]&gt;54;&quot;OLD&quot;;IF([.$L920]&gt;=31;&quot;Middle Age&quot;;IF([.$L92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451" table:style-name="ce1">
            <text:p>214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$L921]&gt;54;&quot;OLD&quot;;IF([.$L921]&gt;=31;&quot;Middle Age&quot;;IF([.$L921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754" table:style-name="ce1">
            <text:p>207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922]&gt;54;&quot;OLD&quot;;IF([.$L922]&gt;=31;&quot;Middle Age&quot;;IF([.$L92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153" table:style-name="ce1">
            <text:p>121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923]&gt;54;&quot;OLD&quot;;IF([.$L923]&gt;=31;&quot;Middle Age&quot;;IF([.$L92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895" table:style-name="ce1">
            <text:p>168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924]&gt;54;&quot;OLD&quot;;IF([.$L924]&gt;=31;&quot;Middle Age&quot;;IF([.$L92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728" table:style-name="ce1">
            <text:p>267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925]&gt;54;&quot;OLD&quot;;IF([.$L925]&gt;=31;&quot;Middle Age&quot;;IF([.$L92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090" table:style-name="ce1">
            <text:p>110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926]&gt;54;&quot;OLD&quot;;IF([.$L926]&gt;=31;&quot;Middle Age&quot;;IF([.$L92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862" table:style-name="ce1">
            <text:p>1586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927]&gt;54;&quot;OLD&quot;;IF([.$L927]&gt;=31;&quot;Middle Age&quot;;IF([.$L92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495" table:style-name="ce1">
            <text:p>264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$L928]&gt;54;&quot;OLD&quot;;IF([.$L928]&gt;=31;&quot;Middle Age&quot;;IF([.$L92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23" table:style-name="ce1">
            <text:p>118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929]&gt;54;&quot;OLD&quot;;IF([.$L929]&gt;=31;&quot;Middle Age&quot;;IF([.$L929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49" table:style-name="ce1">
            <text:p>234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930]&gt;54;&quot;OLD&quot;;IF([.$L930]&gt;=31;&quot;Middle Age&quot;;IF([.$L93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59" table:style-name="ce1">
            <text:p>234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931]&gt;54;&quot;OLD&quot;;IF([.$L931]&gt;=31;&quot;Middle Age&quot;;IF([.$L93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543" table:style-name="ce1">
            <text:p>195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932]&gt;54;&quot;OLD&quot;;IF([.$L932]&gt;=31;&quot;Middle Age&quot;;IF([.$L93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14" table:style-name="ce1">
            <text:p>149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933]&gt;54;&quot;OLD&quot;;IF([.$L933]&gt;=31;&quot;Middle Age&quot;;IF([.$L93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033" table:style-name="ce1">
            <text:p>120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934]&gt;54;&quot;OLD&quot;;IF([.$L934]&gt;=31;&quot;Middle Age&quot;;IF([.$L934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941" table:style-name="ce1">
            <text:p>119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lescent" table:formula="of:=IF([.$L935]&gt;54;&quot;OLD&quot;;IF([.$L935]&gt;=31;&quot;Middle Age&quot;;IF([.$L935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89" table:style-name="ce1">
            <text:p>143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936]&gt;54;&quot;OLD&quot;;IF([.$L936]&gt;=31;&quot;Middle Age&quot;;IF([.$L93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050" table:style-name="ce1">
            <text:p>180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937]&gt;54;&quot;OLD&quot;;IF([.$L937]&gt;=31;&quot;Middle Age&quot;;IF([.$L93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856" table:style-name="ce1">
            <text:p>1985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938]&gt;54;&quot;OLD&quot;;IF([.$L938]&gt;=31;&quot;Middle Age&quot;;IF([.$L93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63" table:style-name="ce1">
            <text:p>116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939]&gt;54;&quot;OLD&quot;;IF([.$L939]&gt;=31;&quot;Middle Age&quot;;IF([.$L93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40" table:style-name="ce1">
            <text:p>277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940]&gt;54;&quot;OLD&quot;;IF([.$L940]&gt;=31;&quot;Middle Age&quot;;IF([.$L94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55" table:style-name="ce1">
            <text:p>234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$L941]&gt;54;&quot;OLD&quot;;IF([.$L941]&gt;=31;&quot;Middle Age&quot;;IF([.$L94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92" table:style-name="ce1">
            <text:p>152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942]&gt;54;&quot;OLD&quot;;IF([.$L942]&gt;=31;&quot;Middle Age&quot;;IF([.$L94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87" table:style-name="ce1">
            <text:p>215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943]&gt;54;&quot;OLD&quot;;IF([.$L943]&gt;=31;&quot;Middle Age&quot;;IF([.$L94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13" table:style-name="ce1">
            <text:p>235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944]&gt;54;&quot;OLD&quot;;IF([.$L944]&gt;=31;&quot;Middle Age&quot;;IF([.$L94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22" table:style-name="ce1">
            <text:p>243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945]&gt;54;&quot;OLD&quot;;IF([.$L945]&gt;=31;&quot;Middle Age&quot;;IF([.$L94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98" table:style-name="ce1">
            <text:p>262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946]&gt;54;&quot;OLD&quot;;IF([.$L946]&gt;=31;&quot;Middle Age&quot;;IF([.$L94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419" table:style-name="ce1">
            <text:p>254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947]&gt;54;&quot;OLD&quot;;IF([.$L947]&gt;=31;&quot;Middle Age&quot;;IF([.$L94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43" table:style-name="ce1">
            <text:p>133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948]&gt;54;&quot;OLD&quot;;IF([.$L948]&gt;=31;&quot;Middle Age&quot;;IF([.$L94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03" table:style-name="ce1">
            <text:p>113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949]&gt;54;&quot;OLD&quot;;IF([.$L949]&gt;=31;&quot;Middle Age&quot;;IF([.$L94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693" table:style-name="ce1">
            <text:p>216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950]&gt;54;&quot;OLD&quot;;IF([.$L950]&gt;=31;&quot;Middle Age&quot;;IF([.$L95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56" table:style-name="ce1">
            <text:p>2805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951]&gt;54;&quot;OLD&quot;;IF([.$L951]&gt;=31;&quot;Middle Age&quot;;IF([.$L95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88" table:style-name="ce1">
            <text:p>117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$L952]&gt;54;&quot;OLD&quot;;IF([.$L952]&gt;=31;&quot;Middle Age&quot;;IF([.$L95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96" table:style-name="ce1">
            <text:p>222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953]&gt;54;&quot;OLD&quot;;IF([.$L953]&gt;=31;&quot;Middle Age&quot;;IF([.$L95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319" table:style-name="ce1">
            <text:p>153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$L954]&gt;54;&quot;OLD&quot;;IF([.$L954]&gt;=31;&quot;Middle Age&quot;;IF([.$L95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54" table:style-name="ce1">
            <text:p>176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955]&gt;54;&quot;OLD&quot;;IF([.$L955]&gt;=31;&quot;Middle Age&quot;;IF([.$L955]&lt;31;&quot;Adollescent&quot;;&quot;Invalid&quot;)))" table:style-name="ce1">
            <text:p>Adolle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62" table:style-name="ce1">
            <text:p>146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956]&gt;54;&quot;OLD&quot;;IF([.$L956]&gt;=31;&quot;Middle Age&quot;;IF([.$L95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41" table:style-name="ce1">
            <text:p>175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$L957]&gt;54;&quot;OLD&quot;;IF([.$L957]&gt;=31;&quot;Middle Age&quot;;IF([.$L95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886" table:style-name="ce1">
            <text:p>138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958]&gt;54;&quot;OLD&quot;;IF([.$L958]&gt;=31;&quot;Middle Age&quot;;IF([.$L95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073" table:style-name="ce1">
            <text:p>130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lescent" table:formula="of:=IF([.$L959]&gt;54;&quot;OLD&quot;;IF([.$L959]&gt;=31;&quot;Middle Age&quot;;IF([.$L959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940" table:style-name="ce1">
            <text:p>219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960]&gt;54;&quot;OLD&quot;;IF([.$L960]&gt;=31;&quot;Middle Age&quot;;IF([.$L960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196" table:style-name="ce1">
            <text:p>201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961]&gt;54;&quot;OLD&quot;;IF([.$L961]&gt;=31;&quot;Middle Age&quot;;IF([.$L96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491" table:style-name="ce1">
            <text:p>234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962]&gt;54;&quot;OLD&quot;;IF([.$L962]&gt;=31;&quot;Middle Age&quot;;IF([.$L96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651" table:style-name="ce1">
            <text:p>166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3">
            <text:p><text:s/>$12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$L963]&gt;54;&quot;OLD&quot;;IF([.$L963]&gt;=31;&quot;Middle Age&quot;;IF([.$L963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813" table:style-name="ce1">
            <text:p>168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$L964]&gt;54;&quot;OLD&quot;;IF([.$L964]&gt;=31;&quot;Middle Age&quot;;IF([.$L964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07" table:style-name="ce1">
            <text:p>160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965]&gt;54;&quot;OLD&quot;;IF([.$L965]&gt;=31;&quot;Middle Age&quot;;IF([.$L965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434" table:style-name="ce1">
            <text:p>2743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966]&gt;54;&quot;OLD&quot;;IF([.$L966]&gt;=31;&quot;Middle Age&quot;;IF([.$L966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56" table:style-name="ce1">
            <text:p>2775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967]&gt;54;&quot;OLD&quot;;IF([.$L967]&gt;=31;&quot;Middle Age&quot;;IF([.$L96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818" table:style-name="ce1">
            <text:p>238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$L968]&gt;54;&quot;OLD&quot;;IF([.$L968]&gt;=31;&quot;Middle Age&quot;;IF([.$L96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012" table:style-name="ce1">
            <text:p>19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$L969]&gt;54;&quot;OLD&quot;;IF([.$L969]&gt;=31;&quot;Middle Age&quot;;IF([.$L96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329" table:style-name="ce1">
            <text:p>183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lescent" table:formula="of:=IF([.$L970]&gt;54;&quot;OLD&quot;;IF([.$L970]&gt;=31;&quot;Middle Age&quot;;IF([.$L970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037" table:style-name="ce1">
            <text:p>290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$L971]&gt;54;&quot;OLD&quot;;IF([.$L971]&gt;=31;&quot;Middle Age&quot;;IF([.$L97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576" table:style-name="ce1">
            <text:p>2657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972]&gt;54;&quot;OLD&quot;;IF([.$L972]&gt;=31;&quot;Middle Age&quot;;IF([.$L972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192" table:style-name="ce1">
            <text:p>121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$L973]&gt;54;&quot;OLD&quot;;IF([.$L973]&gt;=31;&quot;Middle Age&quot;;IF([.$L97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887" table:style-name="ce1">
            <text:p>148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$L974]&gt;54;&quot;OLD&quot;;IF([.$L974]&gt;=31;&quot;Middle Age&quot;;IF([.$L974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34" table:style-name="ce1">
            <text:p>117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975]&gt;54;&quot;OLD&quot;;IF([.$L975]&gt;=31;&quot;Middle Age&quot;;IF([.$L97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62" table:style-name="ce1">
            <text:p>174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976]&gt;54;&quot;OLD&quot;;IF([.$L976]&gt;=31;&quot;Middle Age&quot;;IF([.$L97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659" table:style-name="ce1">
            <text:p>206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977]&gt;54;&quot;OLD&quot;;IF([.$L977]&gt;=31;&quot;Middle Age&quot;;IF([.$L97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04" table:style-name="ce1">
            <text:p>280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978]&gt;54;&quot;OLD&quot;;IF([.$L978]&gt;=31;&quot;Middle Age&quot;;IF([.$L978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741" table:style-name="ce1">
            <text:p>197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$L979]&gt;54;&quot;OLD&quot;;IF([.$L979]&gt;=31;&quot;Middle Age&quot;;IF([.$L97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50" table:style-name="ce1">
            <text:p>174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$L980]&gt;54;&quot;OLD&quot;;IF([.$L980]&gt;=31;&quot;Middle Age&quot;;IF([.$L98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37" table:style-name="ce1">
            <text:p>173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$L981]&gt;54;&quot;OLD&quot;;IF([.$L981]&gt;=31;&quot;Middle Age&quot;;IF([.$L98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94" table:style-name="ce1">
            <text:p>185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$L982]&gt;54;&quot;OLD&quot;;IF([.$L982]&gt;=31;&quot;Middle Age&quot;;IF([.$L982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982" table:style-name="ce1">
            <text:p>159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3">
            <text:p><text:s/>$11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983]&gt;54;&quot;OLD&quot;;IF([.$L983]&gt;=31;&quot;Middle Age&quot;;IF([.$L983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25" table:style-name="ce1">
            <text:p>2862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$L984]&gt;54;&quot;OLD&quot;;IF([.$L984]&gt;=31;&quot;Middle Age&quot;;IF([.$L98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69" table:style-name="ce1">
            <text:p>112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3">
            <text:p><text:s/>$13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$L985]&gt;54;&quot;OLD&quot;;IF([.$L985]&gt;=31;&quot;Middle Age&quot;;IF([.$L985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148" table:style-name="ce1">
            <text:p>251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$L986]&gt;54;&quot;OLD&quot;;IF([.$L986]&gt;=31;&quot;Middle Age&quot;;IF([.$L986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20" table:style-name="ce1">
            <text:p>1392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3">
            <text:p><text:s/>$5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987]&gt;54;&quot;OLD&quot;;IF([.$L987]&gt;=31;&quot;Middle Age&quot;;IF([.$L987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704" table:style-name="ce1">
            <text:p>237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3">
            <text:p><text:s/>$4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$L988]&gt;54;&quot;OLD&quot;;IF([.$L988]&gt;=31;&quot;Middle Age&quot;;IF([.$L988]&lt;31;&quot;Adolle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972" table:style-name="ce1">
            <text:p>289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$L989]&gt;54;&quot;OLD&quot;;IF([.$L989]&gt;=31;&quot;Middle Age&quot;;IF([.$L989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730" table:style-name="ce1">
            <text:p>227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$L990]&gt;54;&quot;OLD&quot;;IF([.$L990]&gt;=31;&quot;Middle Age&quot;;IF([.$L990]&lt;31;&quot;Adolle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34" table:style-name="ce1">
            <text:p>291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$L991]&gt;54;&quot;OLD&quot;;IF([.$L991]&gt;=31;&quot;Middle Age&quot;;IF([.$L991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32" table:style-name="ce1">
            <text:p>143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3">
            <text:p><text:s/>$30,000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lescent" table:formula="of:=IF([.$L992]&gt;54;&quot;OLD&quot;;IF([.$L992]&gt;=31;&quot;Middle Age&quot;;IF([.$L992]&lt;31;&quot;Adollescent&quot;;&quot;Invalid&quot;)))" table:style-name="ce1">
            <text:p>Adolle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17" table:style-name="ce1">
            <text:p>191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$L993]&gt;54;&quot;OLD&quot;;IF([.$L993]&gt;=31;&quot;Middle Age&quot;;IF([.$L993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864" table:style-name="ce1">
            <text:p>228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3">
            <text:p><text:s/>$9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$L994]&gt;54;&quot;OLD&quot;;IF([.$L994]&gt;=31;&quot;Middle Age&quot;;IF([.$L994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92" table:style-name="ce1">
            <text:p>112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50000" table:style-name="ce3">
            <text:p><text:s/>$150,00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$L995]&gt;54;&quot;OLD&quot;;IF([.$L995]&gt;=31;&quot;Middle Age&quot;;IF([.$L995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466" table:style-name="ce1">
            <text:p>134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3">
            <text:p><text:s/>$80,000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$L996]&gt;54;&quot;OLD&quot;;IF([.$L996]&gt;=31;&quot;Middle Age&quot;;IF([.$L996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731" table:style-name="ce1">
            <text:p>237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$L997]&gt;54;&quot;OLD&quot;;IF([.$L997]&gt;=31;&quot;Middle Age&quot;;IF([.$L997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672" table:style-name="ce1">
            <text:p>286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3">
            <text:p><text:s/>$70,000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$L998]&gt;54;&quot;OLD&quot;;IF([.$L998]&gt;=31;&quot;Middle Age&quot;;IF([.$L998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809" table:style-name="ce1">
            <text:p>1180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999]&gt;54;&quot;OLD&quot;;IF([.$L999]&gt;=31;&quot;Middle Age&quot;;IF([.$L999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64" table:style-name="ce1">
            <text:p>196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3">
            <text:p><text:s/>$10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$L1000]&gt;54;&quot;OLD&quot;;IF([.$L1000]&gt;=31;&quot;Middle Age&quot;;IF([.$L1000]&lt;31;&quot;Adolle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121" table:style-name="ce1">
            <text:p>121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3">
            <text:p><text:s/>$60,00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gt;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$L1001]&gt;54;&quot;OLD&quot;;IF([.$L1001]&gt;=31;&quot;Middle Age&quot;;IF([.$L1001]&lt;31;&quot;Adolle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number-rows-repeated="1047575" table:style-name="ro1">
          <table:table-cell table:number-columns-repeated="16384"/>
        </table:table-row>
      </table:table>
      <table:table table:name="Dashboard" table:style-name="ta2">
        <table:table-column table:style-name="co6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number-columns-spanned="14" table:number-rows-spanned="4" table:style-name="ce31">
            <text:p>BiKe Sales Dashboards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covered-table-cell/>
          <table:covered-table-cell table:number-columns-repeated="13"/>
          <table:table-cell table:number-columns-repeated="16370"/>
        </table:table-row>
        <table:table-row table:style-name="ro2">
          <table:covered-table-cell/>
          <table:covered-table-cell table:number-columns-repeated="13"/>
          <table:table-cell table:style-name="ce1"/>
          <table:table-cell table:number-columns-repeated="16369"/>
        </table:table-row>
        <table:table-row table:style-name="ro1">
          <table:table-cell table:style-name="ce1">
            <draw:frame draw:z-index="2" draw:id="id1" draw:style-name="a1" draw:name="Chart 2" svg:x="0in" svg:y="0in" svg:width="4.63435in" svg:height="2.741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4" draw:id="id2" draw:style-name="a2" draw:name="Chart 5" svg:x="0.64167in" svg:y="0.01667in" svg:width="4.68333in" svg:height="2.691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table:number-columns-repeated="1636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in" svg:y="0in" svg:width="9.38333in" svg:height="3.2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Pivot_Table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78" table:default-cell-style-name="ce1"/>
        <table:table-row table:style-name="ro1">
          <table:table-cell table:number-columns-repeated="4"/>
          <table:table-cell table:style-name="ce1">
            <draw:frame draw:z-index="1" draw:id="id3" draw:style-name="a3" draw:name="Chart 1" svg:x="0.65417in" svg:y="0.175in" svg:width="6.6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Average of Income</text:p>
          </table:table-cell>
          <table:table-cell office:value-type="string" table:style-name="ce10">
            <text:p>Column Labels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office:value-type="string" table:style-name="ce10">
            <text:p>Row Labels</text:p>
          </table:table-cell>
          <table:table-cell office:value-type="string" table:style-name="ce4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7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Female</text:p>
          </table:table-cell>
          <table:table-cell office:value-type="currency" office:value="26500" table:style-name="ce17">
            <text:p><text:s/>$26,500<text:s/></text:p>
          </table:table-cell>
          <table:table-cell office:value-type="currency" office:value="33333.333333333336" table:style-name="ce18">
            <text:p><text:s/>$33,333<text:s/></text:p>
          </table:table-cell>
          <table:table-cell office:value-type="currency" office:value="28620.689655172413" table:style-name="ce12">
            <text:p><text:s/>$28,621<text:s/>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ale</text:p>
          </table:table-cell>
          <table:table-cell office:value-type="currency" office:value="29166.666666666668" table:style-name="ce19">
            <text:p><text:s/>$29,167<text:s/></text:p>
          </table:table-cell>
          <table:table-cell office:value-type="currency" office:value="34000" table:style-name="ce20">
            <text:p><text:s/>$34,000<text:s/></text:p>
          </table:table-cell>
          <table:table-cell office:value-type="currency" office:value="30588.235294117647" table:style-name="ce14">
            <text:p><text:s/>$30,588<text:s/>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rand Total</text:p>
          </table:table-cell>
          <table:table-cell office:value-type="currency" office:value="27500" table:style-name="ce21">
            <text:p><text:s/>$27,500<text:s/></text:p>
          </table:table-cell>
          <table:table-cell office:value-type="currency" office:value="33571.428571428572" table:style-name="ce22">
            <text:p><text:s/>$33,571<text:s/></text:p>
          </table:table-cell>
          <table:table-cell office:value-type="currency" office:value="29347.82608695652" table:style-name="ce9">
            <text:p><text:s/>$29,348<text:s/></text:p>
          </table:table-cell>
          <table:table-cell table:number-columns-repeated="16380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4" draw:style-name="a4" draw:name="Chart 3" svg:x="0.00417in" svg:y="0.18333in" svg:width="5.39167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0">
            <text:p>Count of Purchased Bike</text:p>
          </table:table-cell>
          <table:table-cell office:value-type="string" table:style-name="ce10">
            <text:p>Column Labels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office:value-type="string" table:style-name="ce10">
            <text:p>Row Labels</text:p>
          </table:table-cell>
          <table:table-cell office:value-type="string" table:style-name="ce4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7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0-1 Miles</text:p>
          </table:table-cell>
          <table:table-cell office:value-type="float" office:value="12" table:style-name="ce23">
            <text:p>12</text:p>
          </table:table-cell>
          <table:table-cell office:value-type="float" office:value="4" table:style-name="ce24">
            <text:p>4</text:p>
          </table:table-cell>
          <table:table-cell office:value-type="float" office:value="16" table:style-name="ce25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1-2 Miles</text:p>
          </table:table-cell>
          <table:table-cell office:value-type="float" office:value="12" table:style-name="ce26">
            <text:p>12</text:p>
          </table:table-cell>
          <table:table-cell office:value-type="float" office:value="4" table:style-name="ce27">
            <text:p>4</text:p>
          </table:table-cell>
          <table:table-cell office:value-type="float" office:value="16" table:style-name="ce28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-5 Miles</text:p>
          </table:table-cell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-10 Miles</text:p>
          </table:table-cell>
          <table:table-cell office:value-type="float" office:value="8" table:style-name="ce26">
            <text:p>8</text:p>
          </table:table-cell>
          <table:table-cell office:value-type="float" office:value="3" table:style-name="ce27">
            <text:p>3</text:p>
          </table:table-cell>
          <table:table-cell office:value-type="float" office:value="11" table:style-name="ce28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&gt;10 Miles</text:p>
          </table:table-cell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rand Total</text:p>
          </table:table-cell>
          <table:table-cell office:value-type="float" office:value="32" table:style-name="ce29">
            <text:p>32</text:p>
          </table:table-cell>
          <table:table-cell office:value-type="float" office:value="14" table:style-name="ce30">
            <text:p>14</text:p>
          </table:table-cell>
          <table:table-cell office:value-type="float" office:value="46" table:style-name="ce8">
            <text:p>46</text:p>
          </table:table-cell>
          <table:table-cell table:number-columns-repeated="16380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3" draw:id="id5" draw:style-name="a5" draw:name="Chart 4" svg:x="0.00417in" svg:y="0.19167in" svg:width="5.39167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Count of Purchased Bike</text:p>
          </table:table-cell>
          <table:table-cell office:value-type="string" table:style-name="ce10">
            <text:p>Column Labels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office:value-type="string" table:style-name="ce10">
            <text:p>Row Labels</text:p>
          </table:table-cell>
          <table:table-cell office:value-type="string" table:style-name="ce4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7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dollescent</text:p>
          </table:table-cell>
          <table:table-cell office:value-type="float" office:value="8" table:style-name="ce23">
            <text:p>8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5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ddle Age</text:p>
          </table:table-cell>
          <table:table-cell office:value-type="float" office:value="22" table:style-name="ce26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33" table:style-name="ce28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OLD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rand Total</text:p>
          </table:table-cell>
          <table:table-cell office:value-type="float" office:value="32" table:style-name="ce29">
            <text:p>32</text:p>
          </table:table-cell>
          <table:table-cell office:value-type="float" office:value="14" table:style-name="ce30">
            <text:p>14</text:p>
          </table:table-cell>
          <table:table-cell office:value-type="float" office:value="46" table:style-name="ce8">
            <text:p>46</text:p>
          </table:table-cell>
          <table:table-cell table:number-columns-repeated="16380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0">
            <text:p>Count of Purchased Bike</text:p>
          </table:table-cell>
          <table:table-cell office:value-type="string" table:style-name="ce10">
            <text:p>Column Labels</text:p>
          </table:table-cell>
          <table:table-cell table:style-name="ce5"/>
          <table:table-cell table:style-name="ce6"/>
          <table:table-cell/>
          <table:table-cell table:style-name="ce1">
            <draw:frame draw:z-index="4" draw:id="id6" draw:style-name="a6" draw:name="Chart 5" svg:x="0.02917in" svg:y="0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0">
            <text:p>Row Labels</text:p>
          </table:table-cell>
          <table:table-cell office:value-type="string" table:style-name="ce4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7">
            <text:p>Grand Total</text:p>
          </table:table-cell>
          <table:table-cell table:number-columns-repeated="16380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1" table:style-name="ce23">
            <text:p>1</text:p>
          </table:table-cell>
          <table:table-cell table:style-name="ce24"/>
          <table:table-cell office:value-type="float" office:value="1" table:style-name="ce25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3">
            <text:p>26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8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3">
            <text:p>27</text:p>
          </table:table-cell>
          <table:table-cell office:value-type="float" office:value="2" table:style-name="ce26">
            <text:p>2</text:p>
          </table:table-cell>
          <table:table-cell table:style-name="ce27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28" table:style-name="ce13">
            <text:p>28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3">
            <text:p>29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table:style-name="ce13">
            <text:p>31</text:p>
          </table:table-cell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3">
            <text:p>3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3">
            <text:p>33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3">
            <text:p>3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8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3">
            <text:p>35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8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3">
            <text:p>4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3">
            <text:p>4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43" table:style-name="ce13">
            <text:p>43</text:p>
          </table:table-cell>
          <table:table-cell office:value-type="float" office:value="2" table:style-name="ce26">
            <text:p>2</text:p>
          </table:table-cell>
          <table:table-cell table:style-name="ce27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3">
            <text:p>49</text:p>
          </table:table-cell>
          <table:table-cell office:value-type="float" office:value="3" table:style-name="ce26">
            <text:p>3</text:p>
          </table:table-cell>
          <table:table-cell table:style-name="ce27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3">
            <text:p>50</text:p>
          </table:table-cell>
          <table:table-cell office:value-type="float" office:value="4" table:style-name="ce26">
            <text:p>4</text:p>
          </table:table-cell>
          <table:table-cell table:style-name="ce27"/>
          <table:table-cell office:value-type="float" office:value="4" table:style-name="ce28">
            <text:p>4</text:p>
          </table:table-cell>
          <table:table-cell table:number-columns-repeated="16380"/>
        </table:table-row>
        <table:table-row table:style-name="ro1">
          <table:table-cell office:value-type="float" office:value="51" table:style-name="ce13">
            <text:p>51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table:style-name="ce13">
            <text:p>5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54" table:style-name="ce13">
            <text:p>54</text:p>
          </table:table-cell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3">
            <text:p>55</text:p>
          </table:table-cell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13">
            <text:p>57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13">
            <text:p>58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table:style-name="ce13">
            <text:p>60</text:p>
          </table:table-cell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rand Total</text:p>
          </table:table-cell>
          <table:table-cell office:value-type="float" office:value="32" table:style-name="ce29">
            <text:p>32</text:p>
          </table:table-cell>
          <table:table-cell office:value-type="float" office:value="14" table:style-name="ce30">
            <text:p>14</text:p>
          </table:table-cell>
          <table:table-cell office:value-type="float" office:value="46" table:style-name="ce8">
            <text:p>46</text:p>
          </table:table-cell>
          <table:table-cell table:number-columns-repeated="16380"/>
        </table:table-row>
        <table:table-row table:number-rows-repeated="1048492" table:style-name="ro1">
          <table:table-cell table:number-columns-repeated="16384"/>
        </table:table-row>
      </table:table>
      <table:named-expressions>
        <table:named-expression table:name="Slicer_Education" table:expression="of:=&quot;&quot;" table:base-cell-address="Working_sheet.$A$1"/>
        <table:named-expression table:name="Slicer_Marital_Status" table:expression="of:=&quot;&quot;" table:base-cell-address="Working_sheet.$A$1"/>
        <table:named-expression table:name="Slicer_Region" table:expression="of:=&quot;&quot;" table:base-cell-address="Working_sheet.$A$1"/>
      </table:named-expressions>
      <table:database-ranges>
        <table:database-range table:target-range-address="Working_sheet.A1:Working_sheet.N1001" table:display-filter-buttons="true"/>
      </table:database-ranges>
      <table:data-pilot-tables>
        <table:data-pilot-table table:name="PivotTable6" table:target-range-address="Pivot_Table.A60:Pivot_Table.D84" table:show-filter-button="false" table:buttons="Pivot_Table.A61 Pivot_Table.B60">
          <table:source-cell-range table:cell-range-address="Working_sheet.A1:Working_sheet.N1001"/>
          <table:data-pilot-field table:source-field-name="Purchased Bik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urchased Bik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rit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co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ildre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u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false" table:show-details="true"/>
                <table:data-pilot-member table:name="Graduate Degree" table:display="false" table:show-details="true"/>
                <table:data-pilot-member table:name="High School" table:display="false" table:show-details="true"/>
                <table:data-pilot-member table:name="Partial Colleg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ccup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ome Own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ute Dist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 bracke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5" table:target-range-address="Pivot_Table.A40:Pivot_Table.D45" table:show-filter-button="false" table:buttons="Pivot_Table.A41 Pivot_Table.B40">
          <table:source-cell-range table:cell-range-address="Working_sheet.A1:Working_sheet.N1001"/>
          <table:data-pilot-field table:source-field-name="Purchased Bik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 bracket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urchased Bik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rit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co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ildre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u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false" table:show-details="true"/>
                <table:data-pilot-member table:name="Graduate Degree" table:display="false" table:show-details="true"/>
                <table:data-pilot-member table:name="High School" table:display="false" table:show-details="true"/>
                <table:data-pilot-member table:name="Partial Colleg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ccup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ome Own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ute Dist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Pivot_Table.A20:Pivot_Table.D27" table:show-filter-button="false" table:buttons="Pivot_Table.A21 Pivot_Table.B20">
          <table:source-cell-range table:cell-range-address="Working_sheet.A1:Working_sheet.N1001"/>
          <table:data-pilot-field table:source-field-name="Purchased Bik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ute Distanc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urchased Bik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rit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co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ildre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u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false" table:show-details="true"/>
                <table:data-pilot-member table:name="Graduate Degree" table:display="false" table:show-details="true"/>
                <table:data-pilot-member table:name="High School" table:display="false" table:show-details="true"/>
                <table:data-pilot-member table:name="Partial Colleg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ccup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ome Own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 bracke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" table:target-range-address="Pivot_Table.A3:Pivot_Table.D7" table:show-filter-button="false" table:buttons="Pivot_Table.A4 Pivot_Table.B3">
          <table:source-cell-range table:cell-range-address="Working_sheet.A1:Working_sheet.N1001"/>
          <table:data-pilot-field table:source-field-name="Purchased Bik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com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rit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ildre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u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false" table:show-details="true"/>
                <table:data-pilot-member table:name="Graduate Degree" table:display="false" table:show-details="true"/>
                <table:data-pilot-member table:name="High School" table:display="false" table:show-details="true"/>
                <table:data-pilot-member table:name="Partial Colleg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ccup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ome Own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ute Dist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 bracke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42P0" number:language="en" number:country="US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2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42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Daniel Kaboto</meta:initial-creator>
    <dc:creator>Daniel Kaboto</dc:creator>
    <meta:creation-date>2026-06-02T14:11:10Z</meta:creation-date>
    <dc:date>2026-06-02T23:38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cadff4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472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8333in" chart:symbol-height="0.08333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472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cadff4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cadff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2.2pt" svg:width="675.6pt" chart:style-name="Crt0">
        <chart:title chart:style-name="CT00">
          <text:p text:style-name="a0" text:class-names="" text:cond-style-name="">Customer Communt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mmute distance</text:p>
            </chart:title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0-1 Miles</text:p>
            </table:table-cell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1-2 Miles</text:p>
            </table:table-cell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2-5 Miles</text:p>
            </table:table-cell>
            <table:table-cell/>
            <table:table-cell office:value-type="float" office:value="1"/>
          </table:table-row>
          <table:table-row>
            <table:table-cell office:value-type="string">
              <text:p>5-10 Miles</text:p>
            </table:table-cell>
            <table:table-cell office:value-type="float" office:value="8"/>
            <table:table-cell office:value-type="float" office:value="3"/>
          </table:table-row>
          <table:table-row>
            <table:table-cell office:value-type="string">
              <text:p>&gt;10 Miles</text:p>
            </table:table-cell>
            <table:table-cell/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7.4pt" svg:width="333.6733858267716pt" chart:style-name="Crt0">
        <chart:title chart:style-name="CT00">
          <text:p text:style-name="a0" text:class-names="" text:cond-style-name="">Purshase Per Age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Age Bracket</text:p>
            </chart:title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Adollescent</text:p>
            </table:table-cell>
            <table:table-cell office:value-type="float" office:value="8"/>
            <table:table-cell office:value-type="float" office:value="1"/>
          </table:table-row>
          <table:table-row>
            <table:table-cell office:value-type="string">
              <text:p>Middle Age</text:p>
            </table:table-cell>
            <table:table-cell office:value-type="float" office:value="22"/>
            <table:table-cell office:value-type="float" office:value="11"/>
          </table:table-row>
          <table:table-row>
            <table:table-cell office:value-type="string">
              <text:p>OLD</text:p>
            </table:table-cell>
            <table:table-cell office:value-type="float" office:value="2"/>
            <table:table-cell office:value-type="float" office:value="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P0" number:language="en" number:country="US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38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3.8pt" svg:width="337.2pt" chart:style-name="Crt0">
        <chart:title chart:style-name="CT00">
          <text:p text:style-name="a0" text:class-names="" text:cond-style-name="">Avg Income Per Purshas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Gender</text:p>
            </chart:title>
            <chart:categories table:cell-range-address="local-table.$A$2:.$A$3"/>
          </chart:axis>
          <chart:axis chart:dimension="y" chart:name="primary-y" chart:style-name="Axs1">
            <chart:title chart:style-name="AT01">
              <text:p text:style-name="a2" text:class-names="" text:cond-style-name="">Income<text:line-break/></text:p>
            </chart:title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26500"/>
            <table:table-cell office:value-type="float" office:value="33333.333333333336"/>
          </table:table-row>
          <table:table-row>
            <table:table-cell office:value-type="string">
              <text:p>Male</text:p>
            </table:table-cell>
            <table:table-cell office:value-type="float" office:value="29166.666666666668"/>
            <table:table-cell office:value-type="float" office:value="3400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P0" number:language="en" number:country="US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38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475.2pt" chart:style-name="Crt0">
        <chart:title chart:style-name="CT00">
          <text:p text:style-name="a0" text:class-names="" text:cond-style-name="">Avg Income Per Purshas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Gender</text:p>
            </chart:title>
            <chart:categories table:cell-range-address="local-table.$A$2:.$A$3"/>
          </chart:axis>
          <chart:axis chart:dimension="y" chart:name="primary-y" chart:style-name="Axs1">
            <chart:title chart:style-name="AT01">
              <text:p text:style-name="a2" text:class-names="" text:cond-style-name="">Income<text:line-break/></text:p>
            </chart:title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26500"/>
            <table:table-cell office:value-type="float" office:value="33333.333333333336"/>
          </table:table-row>
          <table:table-row>
            <table:table-cell office:value-type="string">
              <text:p>Male</text:p>
            </table:table-cell>
            <table:table-cell office:value-type="float" office:value="29166.666666666668"/>
            <table:table-cell office:value-type="float" office:value="3400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88.2pt" chart:style-name="Crt0">
        <chart:title chart:style-name="CT00">
          <text:p text:style-name="a0" text:class-names="" text:cond-style-name="">Customer Communt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mmute distance</text:p>
            </chart:title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0-1 Miles</text:p>
            </table:table-cell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1-2 Miles</text:p>
            </table:table-cell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2-5 Miles</text:p>
            </table:table-cell>
            <table:table-cell/>
            <table:table-cell office:value-type="float" office:value="1"/>
          </table:table-row>
          <table:table-row>
            <table:table-cell office:value-type="string">
              <text:p>5-10 Miles</text:p>
            </table:table-cell>
            <table:table-cell office:value-type="float" office:value="8"/>
            <table:table-cell office:value-type="float" office:value="3"/>
          </table:table-row>
          <table:table-row>
            <table:table-cell office:value-type="string">
              <text:p>&gt;10 Miles</text:p>
            </table:table-cell>
            <table:table-cell/>
            <table:table-cell office:value-type="float" office:value="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88.2pt" chart:style-name="Crt0">
        <chart:title chart:style-name="CT00">
          <text:p text:style-name="a0" text:class-names="" text:cond-style-name="">Purshase Per Age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Age Bracket</text:p>
            </chart:title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Adollescent</text:p>
            </table:table-cell>
            <table:table-cell office:value-type="float" office:value="8"/>
            <table:table-cell office:value-type="float" office:value="1"/>
          </table:table-row>
          <table:table-row>
            <table:table-cell office:value-type="string">
              <text:p>Middle Age</text:p>
            </table:table-cell>
            <table:table-cell office:value-type="float" office:value="22"/>
            <table:table-cell office:value-type="float" office:value="11"/>
          </table:table-row>
          <table:table-row>
            <table:table-cell office:value-type="string">
              <text:p>OLD</text:p>
            </table:table-cell>
            <table:table-cell office:value-type="float" office:value="2"/>
            <table:table-cell office:value-type="float" office:value="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2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3" chart:class="chart:line" chart:attached-axis="primary-y" chart:style-name="G0S0">
            <chart:data-label chart:style-name="DL00"/>
            <chart:data-point chart:repeated="22"/>
          </chart:series>
          <chart:series chart:label-cell-address="local-table.$C$1" chart:values-cell-range-address="local-table.$C$2:.$C$23" chart:class="chart:line" chart:attached-axis="primary-y" chart:style-name="G0S1">
            <chart:data-label chart:style-name="DL01"/>
            <chart:data-point chart:repeated="2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25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26</text:p>
            </table:table-cell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7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28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29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31</text:p>
            </table:table-cell>
            <table:table-cell/>
            <table:table-cell office:value-type="float" office:value="1"/>
          </table:table-row>
          <table:table-row>
            <table:table-cell office:value-type="string">
              <text:p>32</text:p>
            </table:table-cell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33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34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5</text:p>
            </table:table-cell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40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1</text:p>
            </table:table-cell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43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49</text:p>
            </table:table-cell>
            <table:table-cell office:value-type="float" office:value="3"/>
            <table:table-cell/>
          </table:table-row>
          <table:table-row>
            <table:table-cell office:value-type="string">
              <text:p>50</text:p>
            </table:table-cell>
            <table:table-cell office:value-type="float" office:value="4"/>
            <table:table-cell/>
          </table:table-row>
          <table:table-row>
            <table:table-cell office:value-type="string">
              <text:p>51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52</text:p>
            </table:table-cell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54</text:p>
            </table:table-cell>
            <table:table-cell/>
            <table:table-cell office:value-type="float" office:value="1"/>
          </table:table-row>
          <table:table-row>
            <table:table-cell office:value-type="string">
              <text:p>55</text:p>
            </table:table-cell>
            <table:table-cell/>
            <table:table-cell office:value-type="float" office:value="1"/>
          </table:table-row>
          <table:table-row>
            <table:table-cell office:value-type="string">
              <text:p>57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58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60</text:p>
            </table:table-cell>
            <table:table-cell/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